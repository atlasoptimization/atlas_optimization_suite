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Quotations" style:list-style-name="L58"/>
    <style:style style:name="P2" style:family="paragraph" style:parent-style-name="Standard">
      <style:text-properties officeooo:rsid="0032b231" officeooo:paragraph-rsid="0032b231"/>
    </style:style>
    <style:style style:name="P3" style:family="paragraph" style:parent-style-name="Standard">
      <style:text-properties fo:font-size="32pt" officeooo:rsid="0032b231" officeooo:paragraph-rsid="0032b231" style:font-size-asian="32pt" style:font-size-complex="32pt"/>
    </style:style>
    <style:style style:name="P4" style:family="paragraph" style:parent-style-name="Standard">
      <style:text-properties fo:font-size="36pt" officeooo:rsid="0032b231" officeooo:paragraph-rsid="0032b231" style:font-size-asian="36pt" style:font-size-complex="36pt"/>
    </style:style>
    <style:style style:name="P5" style:family="paragraph" style:parent-style-name="Standard">
      <style:text-properties fo:font-size="36pt" officeooo:rsid="0033e88b" officeooo:paragraph-rsid="0033e88b" style:font-size-asian="36pt" style:font-size-complex="36pt"/>
    </style:style>
    <style:style style:name="P6" style:family="paragraph" style:parent-style-name="Standard">
      <style:text-properties fo:font-size="11pt" officeooo:rsid="0032b231" officeooo:paragraph-rsid="0032b231" style:font-size-asian="9.60000038146973pt" style:font-size-complex="11pt"/>
    </style:style>
    <style:style style:name="P7" style:family="paragraph" style:parent-style-name="Standard">
      <style:text-properties fo:font-size="11pt" officeooo:rsid="0033e88b" officeooo:paragraph-rsid="0033e88b" style:font-size-asian="9.60000038146973pt" style:font-size-complex="11pt"/>
    </style:style>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text-properties officeooo:rsid="0032b231" officeooo:paragraph-rsid="0032b231"/>
    </style:style>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list-style-name="L26"/>
    <style:style style:name="P30" style:family="paragraph" style:parent-style-name="Text_20_body" style:list-style-name="L27"/>
    <style:style style:name="P31" style:family="paragraph" style:parent-style-name="Text_20_body" style:list-style-name="L28"/>
    <style:style style:name="P32" style:family="paragraph" style:parent-style-name="Text_20_body" style:list-style-name="L29"/>
    <style:style style:name="P33" style:family="paragraph" style:parent-style-name="Text_20_body" style:list-style-name="L30"/>
    <style:style style:name="P34" style:family="paragraph" style:parent-style-name="Text_20_body" style:list-style-name="L31"/>
    <style:style style:name="P35" style:family="paragraph" style:parent-style-name="Text_20_body" style:list-style-name="L32"/>
    <style:style style:name="P36" style:family="paragraph" style:parent-style-name="Text_20_body" style:list-style-name="L33"/>
    <style:style style:name="P37" style:family="paragraph" style:parent-style-name="Text_20_body" style:list-style-name="L38"/>
    <style:style style:name="P38" style:family="paragraph" style:parent-style-name="Text_20_body" style:list-style-name="L39"/>
    <style:style style:name="P39" style:family="paragraph" style:parent-style-name="Text_20_body" style:list-style-name="L40"/>
    <style:style style:name="P40" style:family="paragraph" style:parent-style-name="Text_20_body" style:list-style-name="L41"/>
    <style:style style:name="P41" style:family="paragraph" style:parent-style-name="Text_20_body" style:list-style-name="L42"/>
    <style:style style:name="P42" style:family="paragraph" style:parent-style-name="Text_20_body" style:list-style-name="L43"/>
    <style:style style:name="P43" style:family="paragraph" style:parent-style-name="Text_20_body" style:list-style-name="L44"/>
    <style:style style:name="P44" style:family="paragraph" style:parent-style-name="Text_20_body" style:list-style-name="L45"/>
    <style:style style:name="P45" style:family="paragraph" style:parent-style-name="Text_20_body">
      <style:text-properties fo:font-size="11pt" officeooo:rsid="0032b231" officeooo:paragraph-rsid="0032b231" style:font-size-asian="11pt" style:font-size-complex="11pt"/>
    </style:style>
    <style:style style:name="P46" style:family="paragraph" style:parent-style-name="Text_20_body">
      <style:text-properties fo:font-size="11pt" officeooo:rsid="0032b231" officeooo:paragraph-rsid="0032b231" style:font-size-asian="9.60000038146973pt" style:font-size-complex="11pt"/>
    </style:style>
    <style:style style:name="P47" style:family="paragraph" style:parent-style-name="Text_20_body">
      <style:text-properties fo:font-size="11pt" officeooo:rsid="0033e88b" officeooo:paragraph-rsid="0033e88b" style:font-size-asian="9.60000038146973pt" style:font-size-complex="11pt"/>
    </style:style>
    <style:style style:name="P48" style:family="paragraph" style:parent-style-name="Text_20_body" style:list-style-name="L46"/>
    <style:style style:name="P49" style:family="paragraph" style:parent-style-name="Text_20_body" style:list-style-name="L47"/>
    <style:style style:name="P50" style:family="paragraph" style:parent-style-name="Text_20_body" style:list-style-name="L48"/>
    <style:style style:name="P51" style:family="paragraph" style:parent-style-name="Text_20_body" style:list-style-name="L49"/>
    <style:style style:name="P52" style:family="paragraph" style:parent-style-name="Text_20_body" style:list-style-name="L50"/>
    <style:style style:name="P53" style:family="paragraph" style:parent-style-name="Text_20_body" style:list-style-name="L51"/>
    <style:style style:name="P54" style:family="paragraph" style:parent-style-name="Text_20_body" style:list-style-name="L52"/>
    <style:style style:name="P55" style:family="paragraph" style:parent-style-name="Text_20_body" style:list-style-name="L53"/>
    <style:style style:name="P56" style:family="paragraph" style:parent-style-name="Text_20_body" style:list-style-name="L54"/>
    <style:style style:name="P57" style:family="paragraph" style:parent-style-name="Text_20_body" style:list-style-name="L55"/>
    <style:style style:name="P58" style:family="paragraph" style:parent-style-name="Text_20_body" style:list-style-name="L56"/>
    <style:style style:name="P59" style:family="paragraph" style:parent-style-name="Text_20_body" style:list-style-name="L57"/>
    <style:style style:name="P60" style:family="paragraph" style:parent-style-name="Text_20_body" style:list-style-name="L58"/>
    <style:style style:name="P61" style:family="paragraph" style:parent-style-name="Text_20_body" style:list-style-name="L59"/>
    <style:style style:name="P62" style:family="paragraph" style:parent-style-name="Text_20_body" style:list-style-name="L60"/>
    <style:style style:name="P63" style:family="paragraph" style:parent-style-name="Text_20_body" style:list-style-name="L61"/>
    <style:style style:name="P64" style:family="paragraph" style:parent-style-name="Text_20_body" style:list-style-name="L62"/>
    <style:style style:name="P65" style:family="paragraph" style:parent-style-name="Text_20_body" style:list-style-name="L63"/>
    <style:style style:name="P66" style:family="paragraph" style:parent-style-name="Text_20_body" style:list-style-name="L64"/>
    <style:style style:name="P67" style:family="paragraph" style:parent-style-name="Text_20_body" style:list-style-name="L65"/>
    <style:style style:name="P68" style:family="paragraph" style:parent-style-name="Text_20_body" style:list-style-name="L66"/>
    <style:style style:name="P69" style:family="paragraph" style:parent-style-name="Text_20_body" style:list-style-name="L67"/>
    <style:style style:name="P70" style:family="paragraph" style:parent-style-name="Text_20_body" style:list-style-name="L68"/>
    <style:style style:name="P71" style:family="paragraph" style:parent-style-name="Text_20_body" style:list-style-name="L69"/>
    <style:style style:name="P72" style:family="paragraph" style:parent-style-name="Text_20_body" style:list-style-name="L70"/>
    <style:style style:name="P73" style:family="paragraph" style:parent-style-name="Text_20_body" style:list-style-name="L71"/>
    <style:style style:name="P74" style:family="paragraph" style:parent-style-name="Text_20_body" style:list-style-name="L72"/>
    <style:style style:name="P75" style:family="paragraph" style:parent-style-name="Text_20_body" style:list-style-name="L73"/>
    <style:style style:name="P76" style:family="paragraph" style:parent-style-name="Text_20_body" style:list-style-name="L74"/>
    <style:style style:name="P77" style:family="paragraph" style:parent-style-name="Text_20_body" style:list-style-name="L75"/>
    <style:style style:name="P78" style:family="paragraph" style:parent-style-name="Text_20_body" style:list-style-name="L76"/>
    <style:style style:name="P79" style:family="paragraph" style:parent-style-name="Text_20_body" style:list-style-name="L77"/>
    <style:style style:name="P80" style:family="paragraph" style:parent-style-name="Text_20_body" style:list-style-name="L78"/>
    <style:style style:name="P81" style:family="paragraph" style:parent-style-name="Text_20_body" style:list-style-name="L79"/>
    <style:style style:name="P82" style:family="paragraph" style:parent-style-name="Text_20_body" style:list-style-name="L80"/>
    <style:style style:name="P83" style:family="paragraph" style:parent-style-name="Text_20_body" style:list-style-name="L81"/>
    <style:style style:name="P84" style:family="paragraph" style:parent-style-name="Text_20_body" style:list-style-name="L82"/>
    <style:style style:name="P85" style:family="paragraph" style:parent-style-name="Text_20_body" style:list-style-name="L83"/>
    <style:style style:name="P86" style:family="paragraph" style:parent-style-name="Text_20_body" style:list-style-name="L84"/>
    <style:style style:name="P87" style:family="paragraph" style:parent-style-name="Text_20_body" style:list-style-name="L85"/>
    <style:style style:name="P88" style:family="paragraph" style:parent-style-name="Text_20_body" style:list-style-name="L86"/>
    <style:style style:name="P89" style:family="paragraph" style:parent-style-name="Text_20_body" style:list-style-name="L87"/>
    <style:style style:name="P90" style:family="paragraph" style:parent-style-name="Text_20_body" style:list-style-name="L88"/>
    <style:style style:name="P91" style:family="paragraph" style:parent-style-name="Text_20_body" style:list-style-name="L89"/>
    <style:style style:name="P92" style:family="paragraph" style:parent-style-name="Text_20_body" style:list-style-name="L90"/>
    <style:style style:name="P93" style:family="paragraph" style:parent-style-name="Text_20_body" style:list-style-name="L91"/>
    <style:style style:name="P94" style:family="paragraph" style:parent-style-name="Text_20_body" style:list-style-name="L92"/>
    <style:style style:name="P95" style:family="paragraph" style:parent-style-name="Text_20_body" style:list-style-name="L93"/>
    <style:style style:name="P96" style:family="paragraph" style:parent-style-name="Text_20_body" style:list-style-name="L94"/>
    <style:style style:name="P97" style:family="paragraph" style:parent-style-name="Text_20_body" style:list-style-name="L95"/>
    <style:style style:name="P98" style:family="paragraph" style:parent-style-name="Text_20_body" style:list-style-name="L96"/>
    <style:style style:name="P99" style:family="paragraph" style:parent-style-name="Text_20_body" style:list-style-name="L97"/>
    <style:style style:name="P100" style:family="paragraph" style:parent-style-name="Text_20_body" style:list-style-name="L98"/>
    <style:style style:name="P101" style:family="paragraph" style:parent-style-name="Text_20_body" style:list-style-name="L99"/>
    <style:style style:name="P102" style:family="paragraph" style:parent-style-name="Text_20_body" style:list-style-name="L100"/>
    <style:style style:name="P103" style:family="paragraph" style:parent-style-name="Text_20_body" style:list-style-name="L101"/>
    <style:style style:name="P104" style:family="paragraph" style:parent-style-name="Text_20_body" style:list-style-name="L102"/>
    <style:style style:name="P105" style:family="paragraph" style:parent-style-name="Text_20_body" style:list-style-name="L103"/>
    <style:style style:name="P106" style:family="paragraph" style:parent-style-name="Text_20_body" style:list-style-name="L104"/>
    <style:style style:name="P107" style:family="paragraph" style:parent-style-name="Text_20_body" style:list-style-name="L105"/>
    <style:style style:name="P108" style:family="paragraph" style:parent-style-name="Text_20_body" style:list-style-name="L106"/>
    <style:style style:name="P109" style:family="paragraph" style:parent-style-name="Text_20_body" style:list-style-name="L107"/>
    <style:style style:name="P110" style:family="paragraph" style:parent-style-name="Text_20_body" style:list-style-name="L108"/>
    <style:style style:name="P111" style:family="paragraph" style:parent-style-name="Text_20_body" style:list-style-name="L109"/>
    <style:style style:name="P112" style:family="paragraph" style:parent-style-name="Text_20_body" style:list-style-name="L110"/>
    <style:style style:name="P113" style:family="paragraph" style:parent-style-name="Text_20_body" style:list-style-name="L111"/>
    <style:style style:name="P114" style:family="paragraph" style:parent-style-name="Text_20_body" style:list-style-name="L112"/>
    <style:style style:name="P115" style:family="paragraph" style:parent-style-name="Text_20_body" style:list-style-name="L113"/>
    <style:style style:name="P116" style:family="paragraph" style:parent-style-name="Text_20_body" style:list-style-name="L114"/>
    <style:style style:name="P117" style:family="paragraph" style:parent-style-name="Text_20_body" style:list-style-name="L115"/>
    <style:style style:name="P118" style:family="paragraph" style:parent-style-name="Text_20_body" style:list-style-name="L116"/>
    <style:style style:name="P119" style:family="paragraph" style:parent-style-name="Text_20_body" style:list-style-name="L117"/>
    <style:style style:name="P120" style:family="paragraph" style:parent-style-name="Text_20_body" style:list-style-name="L118"/>
    <style:style style:name="P121" style:family="paragraph" style:parent-style-name="Text_20_body" style:list-style-name="L119"/>
    <style:style style:name="P122" style:family="paragraph" style:parent-style-name="Text_20_body" style:list-style-name="L120"/>
    <style:style style:name="P123" style:family="paragraph" style:parent-style-name="Text_20_body" style:list-style-name="L121"/>
    <style:style style:name="P124" style:family="paragraph" style:parent-style-name="Text_20_body" style:list-style-name="L122"/>
    <style:style style:name="P125" style:family="paragraph" style:parent-style-name="Text_20_body" style:list-style-name="L123"/>
    <style:style style:name="P126" style:family="paragraph" style:parent-style-name="Text_20_body" style:list-style-name="L124"/>
    <style:style style:name="P127" style:family="paragraph" style:parent-style-name="Text_20_body" style:list-style-name="L125"/>
    <style:style style:name="P128" style:family="paragraph" style:parent-style-name="Text_20_body" style:list-style-name="L126"/>
    <style:style style:name="P129" style:family="paragraph" style:parent-style-name="Text_20_body" style:list-style-name="L127"/>
    <style:style style:name="P130" style:family="paragraph" style:parent-style-name="Text_20_body" style:list-style-name="L128"/>
    <style:style style:name="P131" style:family="paragraph" style:parent-style-name="Text_20_body" style:list-style-name="L129"/>
    <style:style style:name="P132" style:family="paragraph" style:parent-style-name="Text_20_body" style:list-style-name="L130"/>
    <style:style style:name="P133" style:family="paragraph" style:parent-style-name="Text_20_body" style:list-style-name="L131"/>
    <style:style style:name="P134" style:family="paragraph" style:parent-style-name="Text_20_body" style:list-style-name="L132"/>
    <style:style style:name="P135" style:family="paragraph" style:parent-style-name="Text_20_body" style:list-style-name="L133"/>
    <style:style style:name="P136" style:family="paragraph" style:parent-style-name="Text_20_body" style:list-style-name="L134"/>
    <style:style style:name="P137" style:family="paragraph" style:parent-style-name="Text_20_body" style:list-style-name="L135"/>
    <style:style style:name="P138" style:family="paragraph" style:parent-style-name="Text_20_body" style:list-style-name="L136"/>
    <style:style style:name="P139" style:family="paragraph" style:parent-style-name="Text_20_body" style:list-style-name="L137"/>
    <style:style style:name="P140" style:family="paragraph" style:parent-style-name="Text_20_body" style:list-style-name="L138"/>
    <style:style style:name="P141" style:family="paragraph" style:parent-style-name="Text_20_body" style:list-style-name="L139"/>
    <style:style style:name="P142" style:family="paragraph" style:parent-style-name="Text_20_body" style:list-style-name="L140"/>
    <style:style style:name="P143" style:family="paragraph" style:parent-style-name="Text_20_body" style:list-style-name="L141"/>
    <style:style style:name="P144" style:family="paragraph" style:parent-style-name="Text_20_body" style:list-style-name="L142"/>
    <style:style style:name="P145" style:family="paragraph" style:parent-style-name="Text_20_body" style:list-style-name="L143"/>
    <style:style style:name="P146" style:family="paragraph" style:parent-style-name="Text_20_body" style:list-style-name="L144"/>
    <style:style style:name="P147" style:family="paragraph" style:parent-style-name="Text_20_body" style:list-style-name="L145"/>
    <style:style style:name="P148" style:family="paragraph" style:parent-style-name="Text_20_body" style:list-style-name="L146"/>
    <style:style style:name="P149" style:family="paragraph" style:parent-style-name="Text_20_body" style:list-style-name="L147"/>
    <style:style style:name="P150" style:family="paragraph" style:parent-style-name="Text_20_body" style:list-style-name="L148"/>
    <style:style style:name="P151" style:family="paragraph" style:parent-style-name="Text_20_body" style:list-style-name="L149"/>
    <style:style style:name="P152" style:family="paragraph" style:parent-style-name="Text_20_body" style:list-style-name="L150"/>
    <style:style style:name="P153" style:family="paragraph" style:parent-style-name="Text_20_body" style:list-style-name="L151"/>
    <style:style style:name="P154" style:family="paragraph" style:parent-style-name="Text_20_body" style:list-style-name="L152"/>
    <style:style style:name="P155" style:family="paragraph" style:parent-style-name="Text_20_body" style:list-style-name="L153"/>
    <style:style style:name="P156" style:family="paragraph" style:parent-style-name="Text_20_body" style:list-style-name="L154"/>
    <style:style style:name="P157" style:family="paragraph" style:parent-style-name="Text_20_body" style:list-style-name="L155"/>
    <style:style style:name="P158" style:family="paragraph" style:parent-style-name="Text_20_body" style:list-style-name="L156"/>
    <style:style style:name="P159" style:family="paragraph" style:parent-style-name="Text_20_body" style:list-style-name="L157"/>
    <style:style style:name="P160" style:family="paragraph" style:parent-style-name="Text_20_body" style:list-style-name="L158"/>
    <style:style style:name="P161" style:family="paragraph" style:parent-style-name="Text_20_body" style:list-style-name="L159"/>
    <style:style style:name="P162" style:family="paragraph" style:parent-style-name="Text_20_body" style:list-style-name="L160"/>
    <style:style style:name="P163" style:family="paragraph" style:parent-style-name="Text_20_body" style:list-style-name="L161"/>
    <style:style style:name="P164" style:family="paragraph" style:parent-style-name="Text_20_body" style:list-style-name="L162"/>
    <style:style style:name="P165" style:family="paragraph" style:parent-style-name="Text_20_body" style:list-style-name="L163"/>
    <style:style style:name="P166" style:family="paragraph" style:parent-style-name="Text_20_body" style:list-style-name="L164"/>
    <style:style style:name="P167" style:family="paragraph" style:parent-style-name="Text_20_body" style:list-style-name="L165"/>
    <style:style style:name="P168" style:family="paragraph" style:parent-style-name="Text_20_body" style:list-style-name="L166"/>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ATCH 1</text:p>
      <text:p text:style-name="P2"/>
      <text:p text:style-name="P12">Batch 1 / Prompt 1 — Repository audit and implementation plan</text:p>
      <text:p text:style-name="Text_20_body">Context:<text:line-break/>We are building the Atlas Optimization Suite: a visual optimization workbench inspired by the existing Data Science Deck project. The long-term product is a React/TypeScript frontend plus Python/FastAPI backend for card-based optimization modeling. Users build models from cards, typed tags, properties, query-based indexing, tagged functions, objectives, constraints, evaluation, and CVXPY solving.</text:p>
      <text:p text:style-name="Text_20_body">Goal:<text:line-break/>Inspect the current repository and produce a concrete implementation plan for the first working prototype.</text:p>
      <text:p text:style-name="Text_20_body">Detailed requirements:</text:p>
      <text:list xml:id="list3325698287" text:style-name="L6">
        <text:list-item>
          <text:p text:style-name="P8">Inspect the existing project structure.</text:p>
        </text:list-item>
        <text:list-item>
          <text:p text:style-name="P8">Identify the frontend framework, build tooling, state management, styling approach, and test setup.</text:p>
        </text:list-item>
        <text:list-item>
          <text:p text:style-name="P8">Identify reusable pieces from the Data Science Deck-style app: infinite desk, cards, dialogs, inspector, menus, persistence, undo/redo, search, export, etc.</text:p>
        </text:list-item>
        <text:list-item>
          <text:p text:style-name="P8">Propose a clean architecture for the Atlas Optimization Suite inside the current repo.</text:p>
        </text:list-item>
        <text:list-item>
          <text:p text:style-name="P8">Decide whether to create a new app folder/package or adapt the existing app.</text:p>
        </text:list-item>
        <text:list-item>
          <text:p text:style-name="P8">Do not implement large features yet, except small harmless scaffolding if needed.</text:p>
        </text:list-item>
        <text:list-item>
          <text:p text:style-name="P8">Document the proposed frontend/backend split.</text:p>
        </text:list-item>
        <text:list-item>
          <text:p text:style-name="P8">Document the planned Atlas IR JSON structure at a high level.</text:p>
        </text:list-item>
        <text:list-item>
          <text:p text:style-name="P8">Add or update a short <text:span text:style-name="Source_20_Text">docs/atlas_optimization_suite_plan.md</text:span>.</text:p>
        </text:list-item>
      </text:list>
      <text:p text:style-name="Text_20_body">Testing:</text:p>
      <text:list xml:id="list588868414" text:style-name="L7">
        <text:list-item>
          <text:p text:style-name="P9">Run the existing test suite.</text:p>
        </text:list-item>
        <text:list-item>
          <text:p text:style-name="P9">Run lint/typecheck/build commands if present.</text:p>
        </text:list-item>
        <text:list-item>
          <text:p text:style-name="P9">Report what passes and what fails.</text:p>
        </text:list-item>
        <text:list-item>
          <text:p text:style-name="P9">Do not ignore failing tests; either fix trivial failures or document them clearly.</text:p>
        </text:list-item>
      </text:list>
      <text:p text:style-name="Text_20_body">Acceptance criteria:</text:p>
      <text:list xml:id="list2677033220" text:style-name="L8">
        <text:list-item>
          <text:p text:style-name="P10">A clear implementation plan exists in <text:span text:style-name="Source_20_Text">docs/atlas_optimization_suite_plan.md</text:span>.</text:p>
        </text:list-item>
        <text:list-item>
          <text:p text:style-name="P10">The plan lists concrete next files/components to create.</text:p>
        </text:list-item>
        <text:list-item>
          <text:p text:style-name="P10">Existing app still runs.</text:p>
        </text:list-item>
        <text:list-item>
          <text:p text:style-name="P10">Existing tests/build are not broken.</text:p>
        </text:list-item>
      </text:list>
      <text:p text:style-name="Text_20_body"><text:soft-page-break/>Constraints:</text:p>
      <text:list xml:id="list3851622416" text:style-name="L9">
        <text:list-item>
          <text:p text:style-name="P11">Keep the plan practical and implementation-oriented.</text:p>
        </text:list-item>
        <text:list-item>
          <text:p text:style-name="P11">Do not add domain-specific optimization archetypes yet.</text:p>
        </text:list-item>
        <text:list-item>
          <text:p text:style-name="P11">Do not hard-code example models into architecture.</text:p>
        </text:list-item>
        <text:list-item>
          <text:p text:style-name="P11">Do not leave vague TODOs where concrete next steps are possible.</text:p>
        </text:list-item>
        <text:list-item>
          <text:p text:style-name="P11">Preserve existing functionality.</text:p>
        </text:list-item>
      </text:list>
      <text:p text:style-name="P2"/>
      <text:p text:style-name="P2"/>
      <text:p text:style-name="P2"/>
      <text:p text:style-name="P12">Batch 1 / Prompt 2 — Create Atlas app skeleton and global layout</text:p>
      <text:p text:style-name="Text_20_body">Context:<text:line-break/>We are implementing the Atlas Optimization Suite as a visual optimization workbench. The core UI should have an infinite card desk in the center, a bottom dock for objectives/constraints, a right inspector/solution panel, and a top toolbar with Evaluate, Solve, Inspect, Export, Undo/Redo, and Search.</text:p>
      <text:p text:style-name="Text_20_body">Current state:<text:line-break/>Use the repository audit and plan from <text:span text:style-name="Source_20_Text">docs/atlas_optimization_suite_plan.md</text:span>.</text:p>
      <text:p text:style-name="Text_20_body">Goal:<text:line-break/>Create the first runnable Atlas Optimization Suite UI skeleton.</text:p>
      <text:p text:style-name="Text_20_body">Detailed requirements:</text:p>
      <text:list xml:id="list2330987847" text:style-name="L10">
        <text:list-item>
          <text:p text:style-name="P13">Add a new Atlas app route/view or cleanly repurpose an existing app entry point.</text:p>
        </text:list-item>
        <text:list-item>
          <text:p text:style-name="P13">Implement the main layout:</text:p>
          <text:list>
            <text:list-item>
              <text:p text:style-name="P13">top toolbar</text:p>
            </text:list-item>
            <text:list-item>
              <text:p text:style-name="P13">central workbench area</text:p>
            </text:list-item>
            <text:list-item>
              <text:p text:style-name="P13">bottom objectives/constraints dock</text:p>
            </text:list-item>
            <text:list-item>
              <text:p text:style-name="P13">right inspector/solution panel</text:p>
            </text:list-item>
          </text:list>
        </text:list-item>
        <text:list-item>
          <text:p text:style-name="P13">Add placeholder buttons for:</text:p>
          <text:list>
            <text:list-item>
              <text:p text:style-name="P13">Evaluate</text:p>
            </text:list-item>
            <text:list-item>
              <text:p text:style-name="P13">Solve</text:p>
            </text:list-item>
            <text:list-item>
              <text:p text:style-name="P13">Inspect</text:p>
            </text:list-item>
            <text:list-item>
              <text:p text:style-name="P13">Export</text:p>
            </text:list-item>
            <text:list-item>
              <text:p text:style-name="P13">Undo</text:p>
            </text:list-item>
            <text:list-item>
              <text:p text:style-name="P13">Redo</text:p>
            </text:list-item>
            <text:list-item>
              <text:p text:style-name="P13">Search</text:p>
            </text:list-item>
          </text:list>
        </text:list-item>
        <text:list-item>
          <text:p text:style-name="P13"><text:soft-page-break/>The UI should clearly communicate that this is a card-based optimization workbench.</text:p>
        </text:list-item>
        <text:list-item>
          <text:p text:style-name="P13">Use a clean, professional engineering-workbench style.</text:p>
        </text:list-item>
        <text:list-item>
          <text:p text:style-name="P13">Do not implement backend solving yet.</text:p>
        </text:list-item>
        <text:list-item>
          <text:p text:style-name="P13">Do not implement domain-specific objects yet.</text:p>
        </text:list-item>
        <text:list-item>
          <text:p text:style-name="P13">Keep the layout responsive enough for desktop use.</text:p>
        </text:list-item>
        <text:list-item>
          <text:p text:style-name="P13">Add basic empty-state text explaining what the workbench is for.</text:p>
        </text:list-item>
      </text:list>
      <text:p text:style-name="Text_20_body">Testing:</text:p>
      <text:list xml:id="list583191754" text:style-name="L11">
        <text:list-item>
          <text:p text:style-name="P14">Add component/render tests if the repo has a React test setup.</text:p>
        </text:list-item>
        <text:list-item>
          <text:p text:style-name="P14">At minimum test that the main Atlas app view renders without crashing.</text:p>
        </text:list-item>
        <text:list-item>
          <text:p text:style-name="P14">Run typecheck/build/lint where available.</text:p>
        </text:list-item>
        <text:list-item>
          <text:p text:style-name="P14">Fix any errors caused by the new skeleton.</text:p>
        </text:list-item>
      </text:list>
      <text:p text:style-name="Text_20_body">Acceptance criteria:</text:p>
      <text:list xml:id="list290488928" text:style-name="L12">
        <text:list-item>
          <text:p text:style-name="P15">The app opens to a recognizable Atlas Optimization Suite layout.</text:p>
        </text:list-item>
        <text:list-item>
          <text:p text:style-name="P15">Toolbar, workbench, bottom dock, and inspector/solution panel are visible.</text:p>
        </text:list-item>
        <text:list-item>
          <text:p text:style-name="P15">No placeholder button should crash when clicked; either no-op safely or show a small message.</text:p>
        </text:list-item>
        <text:list-item>
          <text:p text:style-name="P15">Existing app functionality remains intact.</text:p>
        </text:list-item>
        <text:list-item>
          <text:p text:style-name="P15">README or docs mention how to start the Atlas prototype.</text:p>
        </text:list-item>
      </text:list>
      <text:p text:style-name="Text_20_body">Constraints:</text:p>
      <text:list xml:id="list3164973002" text:style-name="L13">
        <text:list-item>
          <text:p text:style-name="P16">Keep implementation simple.</text:p>
        </text:list-item>
        <text:list-item>
          <text:p text:style-name="P16">No fake “preview only” features that look functional but are broken.</text:p>
        </text:list-item>
        <text:list-item>
          <text:p text:style-name="P16">Do not introduce heavy dependencies unless justified.</text:p>
        </text:list-item>
        <text:list-item>
          <text:p text:style-name="P16">Preserve existing functionality.</text:p>
        </text:list-item>
      </text:list>
      <text:p text:style-name="P2"/>
      <text:p text:style-name="P2"/>
      <text:p text:style-name="P12">Batch 1 / Prompt 3 — Implement infinite workbench and basic card rendering</text:p>
      <text:p text:style-name="Text_20_body">Context:<text:line-break/>The Atlas Optimization Suite is centered on an infinite zoomable desk. Everything important is represented as a card: Object, Decision, Data, Function, Constraint, Objective, and later more. This task implements the basic workbench and card rendering.</text:p>
      <text:p text:style-name="Text_20_body">Current state:<text:line-break/>The Atlas app skeleton exists with top toolbar, center workbench, bottom dock, and right inspector/solution panel.</text:p>
      <text:p text:style-name="Text_20_body"><text:soft-page-break/>Goal:<text:line-break/>Implement a usable card workbench with pan/zoom, draggable cards, selection, and simple card rendering.</text:p>
      <text:p text:style-name="Text_20_body">Detailed requirements:</text:p>
      <text:list xml:id="list4281321911" text:style-name="L14">
        <text:list-item>
          <text:p text:style-name="P17">Implement an infinite or large zoomable/pannable workbench.</text:p>
        </text:list-item>
        <text:list-item>
          <text:p text:style-name="P17">Use an existing graph/canvas library if already present or appropriate, preferably one that supports nodes/cards, pan, zoom, selection, minimap later, and custom rendering.</text:p>
        </text:list-item>
        <text:list-item>
          <text:p text:style-name="P17">Implement a basic <text:span text:style-name="Source_20_Text">AtlasCard</text:span> data model in TypeScript:</text:p>
          <text:list>
            <text:list-item>
              <text:p text:style-name="P17">id</text:p>
            </text:list-item>
            <text:list-item>
              <text:p text:style-name="P17">type: object | decision | data | function | constraint | objective</text:p>
            </text:list-item>
            <text:list-item>
              <text:p text:style-name="P17">title</text:p>
            </text:list-item>
            <text:list-item>
              <text:p text:style-name="P17">position</text:p>
            </text:list-item>
            <text:list-item>
              <text:p text:style-name="P17">tags</text:p>
            </text:list-item>
            <text:list-item>
              <text:p text:style-name="P17">properties</text:p>
            </text:list-item>
            <text:list-item>
              <text:p text:style-name="P17">notes</text:p>
            </text:list-item>
          </text:list>
        </text:list-item>
        <text:list-item>
          <text:p text:style-name="P17">Render cards with type-specific visual distinction.</text:p>
        </text:list-item>
        <text:list-item>
          <text:p text:style-name="P17">Allow selecting a card.</text:p>
        </text:list-item>
        <text:list-item>
          <text:p text:style-name="P17">Allow dragging cards.</text:p>
        </text:list-item>
        <text:list-item>
          <text:p text:style-name="P17">Show selected card details in the inspector.</text:p>
        </text:list-item>
        <text:list-item>
          <text:p text:style-name="P17">Add simple “create card” actions for all six basic card types.</text:p>
        </text:list-item>
        <text:list-item>
          <text:p text:style-name="P17">Add delete card.</text:p>
        </text:list-item>
        <text:list-item>
          <text:p text:style-name="P17">Persist card positions and card data in local storage for now.</text:p>
        </text:list-item>
        <text:list-item>
          <text:p text:style-name="P17">Add reset/clear demo state action.</text:p>
        </text:list-item>
      </text:list>
      <text:p text:style-name="Text_20_body">Testing:</text:p>
      <text:list xml:id="list288618133" text:style-name="L15">
        <text:list-item>
          <text:p text:style-name="P18">Add tests for card model helpers if created.</text:p>
        </text:list-item>
        <text:list-item>
          <text:p text:style-name="P18">Add UI test or component test that cards render.</text:p>
        </text:list-item>
        <text:list-item>
          <text:p text:style-name="P18">Add test that creating a card updates state.</text:p>
        </text:list-item>
        <text:list-item>
          <text:p text:style-name="P18">Add test that deleting a card removes it from state, if feasible.</text:p>
        </text:list-item>
        <text:list-item>
          <text:p text:style-name="P18">Run typecheck/build/lint.</text:p>
        </text:list-item>
      </text:list>
      <text:p text:style-name="Text_20_body">Acceptance criteria:</text:p>
      <text:list xml:id="list1159685198" text:style-name="L16">
        <text:list-item>
          <text:p text:style-name="P19">User can create Object, Decision, Data, Function, Constraint, and Objective cards.</text:p>
        </text:list-item>
        <text:list-item>
          <text:p text:style-name="P19">User can drag cards on the workbench.</text:p>
        </text:list-item>
        <text:list-item>
          <text:p text:style-name="P19">User can select a card and see its details in the inspector.</text:p>
        </text:list-item>
        <text:list-item>
          <text:p text:style-name="P19"><text:soft-page-break/>User can delete a card.</text:p>
        </text:list-item>
        <text:list-item>
          <text:p text:style-name="P19">Cards persist after refresh via local storage.</text:p>
        </text:list-item>
        <text:list-item>
          <text:p text:style-name="P19">App remains stable under basic interactions.</text:p>
        </text:list-item>
      </text:list>
      <text:p text:style-name="Text_20_body">Constraints:</text:p>
      <text:list xml:id="list2359772478" text:style-name="L17">
        <text:list-item>
          <text:p text:style-name="P20">Do not implement optimization logic yet.</text:p>
        </text:list-item>
        <text:list-item>
          <text:p text:style-name="P20">Keep card data generic and serializable.</text:p>
        </text:list-item>
        <text:list-item>
          <text:p text:style-name="P20">Do not hard-code a single example into the state model.</text:p>
        </text:list-item>
        <text:list-item>
          <text:p text:style-name="P20">Do not break existing functionality.</text:p>
        </text:list-item>
      </text:list>
      <text:p text:style-name="P2"/>
      <text:p text:style-name="P2"/>
      <text:p text:style-name="P4">BATCH 2</text:p>
      <text:p text:style-name="P45">Batch 2 / Prompt 1 — Typed tags and card inspector editing</text:p>
      <text:p text:style-name="Text_20_body">Context:<text:line-break/>Atlas Optimization Suite uses cards as first-class modeling objects. Cards carry typed tags such as <text:span text:style-name="Source_20_Text">type = product</text:span>, <text:span text:style-name="Source_20_Text">factory = A</text:span>, <text:span text:style-name="Source_20_Text">status = active</text:span>. These tags are used later for query-based indexing and tagged functions.</text:p>
      <text:p text:style-name="Text_20_body">Current state:<text:line-break/>The app has a workbench with draggable cards, selectable cards, basic card types, and inspector display.</text:p>
      <text:p text:style-name="Text_20_body">Goal:<text:line-break/>Implement editable typed tags for all cards.</text:p>
      <text:p text:style-name="Text_20_body">Detailed requirements:</text:p>
      <text:list xml:id="list3130396906" text:style-name="L18">
        <text:list-item>
          <text:p text:style-name="P21">Extend the card model so each card has typed tags:</text:p>
          <text:list>
            <text:list-item>
              <text:p text:style-name="P21">key</text:p>
            </text:list-item>
            <text:list-item>
              <text:p text:style-name="P21">value</text:p>
            </text:list-item>
          </text:list>
        </text:list-item>
        <text:list-item>
          <text:p text:style-name="P21">Show tags as visual chips on cards.</text:p>
        </text:list-item>
        <text:list-item>
          <text:p text:style-name="P21">In the inspector, allow adding, editing, and deleting typed tags.</text:p>
        </text:list-item>
        <text:list-item>
          <text:p text:style-name="P21">Prevent empty tag keys.</text:p>
        </text:list-item>
        <text:list-item>
          <text:p text:style-name="P21">Allow multiple tags per card.</text:p>
        </text:list-item>
        <text:list-item>
          <text:p text:style-name="P21">Use simple string values for now.</text:p>
        </text:list-item>
        <text:list-item>
          <text:p text:style-name="P21">Add a few optional quick-add tag presets, but do not make them domain-specific beyond generic examples like <text:span text:style-name="Source_20_Text">type</text:span>, <text:span text:style-name="Source_20_Text">group</text:span>, <text:span text:style-name="Source_20_Text">status</text:span>.</text:p>
        </text:list-item>
        <text:list-item>
          <text:p text:style-name="P21"><text:soft-page-break/>Ensure tag changes update card rendering immediately.</text:p>
        </text:list-item>
        <text:list-item>
          <text:p text:style-name="P21">Persist tags in local storage.</text:p>
        </text:list-item>
      </text:list>
      <text:p text:style-name="Text_20_body">Testing:</text:p>
      <text:list xml:id="list2522498807" text:style-name="L19">
        <text:list-item>
          <text:p text:style-name="P22">Add unit tests for tag add/edit/delete helpers.</text:p>
        </text:list-item>
        <text:list-item>
          <text:p text:style-name="P22">Add validation tests for empty tag keys.</text:p>
        </text:list-item>
        <text:list-item>
          <text:p text:style-name="P22">Add component/UI tests if feasible.</text:p>
        </text:list-item>
        <text:list-item>
          <text:p text:style-name="P22">Run lint/typecheck/build.</text:p>
        </text:list-item>
      </text:list>
      <text:p text:style-name="Text_20_body">Acceptance criteria:</text:p>
      <text:list xml:id="list773176073" text:style-name="L20">
        <text:list-item>
          <text:p text:style-name="P23">User can add <text:span text:style-name="Source_20_Text">type = product</text:span> to a card.</text:p>
        </text:list-item>
        <text:list-item>
          <text:p text:style-name="P23">User can add <text:span text:style-name="Source_20_Text">factory = A</text:span> to a card.</text:p>
        </text:list-item>
        <text:list-item>
          <text:p text:style-name="P23">Tags appear on the card.</text:p>
        </text:list-item>
        <text:list-item>
          <text:p text:style-name="P23">Tags can be edited and removed.</text:p>
        </text:list-item>
        <text:list-item>
          <text:p text:style-name="P23">Tags survive page refresh.</text:p>
        </text:list-item>
        <text:list-item>
          <text:p text:style-name="P23">Existing card creation, dragging, selection, and deletion still work.</text:p>
        </text:list-item>
      </text:list>
      <text:p text:style-name="Text_20_body">Constraints:</text:p>
      <text:list xml:id="list2001668499" text:style-name="L21">
        <text:list-item>
          <text:p text:style-name="P24">Keep tags generic.</text:p>
        </text:list-item>
        <text:list-item>
          <text:p text:style-name="P24">Do not implement query logic yet.</text:p>
        </text:list-item>
        <text:list-item>
          <text:p text:style-name="P24">Do not hard-code business archetypes.</text:p>
        </text:list-item>
        <text:list-item>
          <text:p text:style-name="P24">Preserve existing functionality.</text:p>
        </text:list-item>
      </text:list>
      <text:p text:style-name="P4"/>
      <text:p text:style-name="P4"/>
      <text:p text:style-name="P45">Batch 2 / Prompt 2 — Editable card properties with simple value types</text:p>
      <text:p text:style-name="Text_20_body">Context:<text:line-break/>Cards need editable properties. Properties may later become constants, formulas, decisions, data references, or solution values. For now we need a robust generic property system.</text:p>
      <text:p text:style-name="Text_20_body">Current state:<text:line-break/>Cards support typed tags and inspector editing.</text:p>
      <text:p text:style-name="Text_20_body">Goal:<text:line-break/>Implement editable card properties.</text:p>
      <text:p text:style-name="Text_20_body">Detailed requirements:</text:p>
      <text:list xml:id="list3636435485" text:style-name="L22">
        <text:list-item>
          <text:p text:style-name="P25"><text:soft-page-break/>Extend the card model with properties:</text:p>
          <text:list>
            <text:list-item>
              <text:p text:style-name="P25">id</text:p>
            </text:list-item>
            <text:list-item>
              <text:p text:style-name="P25">name</text:p>
            </text:list-item>
            <text:list-item>
              <text:p text:style-name="P25">kind: constant | formula | decision_ref | data_ref</text:p>
            </text:list-item>
            <text:list-item>
              <text:p text:style-name="P25">value</text:p>
            </text:list-item>
            <text:list-item>
              <text:p text:style-name="P25">unit optional</text:p>
            </text:list-item>
            <text:list-item>
              <text:p text:style-name="P25">notes optional</text:p>
            </text:list-item>
          </text:list>
        </text:list-item>
        <text:list-item>
          <text:p text:style-name="P25">Show a compact property summary on each card.</text:p>
        </text:list-item>
        <text:list-item>
          <text:p text:style-name="P25">In the inspector, allow adding, editing, and deleting properties.</text:p>
        </text:list-item>
        <text:list-item>
          <text:p text:style-name="P25">Support constant values as strings/numbers initially.</text:p>
        </text:list-item>
        <text:list-item>
          <text:p text:style-name="P25">Support formula properties as plain text expressions initially.</text:p>
        </text:list-item>
        <text:list-item>
          <text:p text:style-name="P25">Support decision_ref and data_ref as plain string references initially.</text:p>
        </text:list-item>
        <text:list-item>
          <text:p text:style-name="P25">Prevent empty property names.</text:p>
        </text:list-item>
        <text:list-item>
          <text:p text:style-name="P25">Persist properties in local storage.</text:p>
        </text:list-item>
        <text:list-item>
          <text:p text:style-name="P25">Keep the structure JSON-serializable.</text:p>
        </text:list-item>
        <text:list-item>
          <text:p text:style-name="P25">Do not evaluate formulas yet.</text:p>
        </text:list-item>
      </text:list>
      <text:p text:style-name="Text_20_body">Testing:</text:p>
      <text:list xml:id="list4005306873" text:style-name="L23">
        <text:list-item>
          <text:p text:style-name="P26">Add unit tests for property add/edit/delete helpers.</text:p>
        </text:list-item>
        <text:list-item>
          <text:p text:style-name="P26">Add validation test for empty property names.</text:p>
        </text:list-item>
        <text:list-item>
          <text:p text:style-name="P26">Add serialization/local-storage persistence test if a persistence helper exists.</text:p>
        </text:list-item>
        <text:list-item>
          <text:p text:style-name="P26">Run lint/typecheck/build.</text:p>
        </text:list-item>
      </text:list>
      <text:p text:style-name="Text_20_body">Acceptance criteria:</text:p>
      <text:list xml:id="list2689610797" text:style-name="L24">
        <text:list-item>
          <text:p text:style-name="P27">User can add <text:span text:style-name="Source_20_Text">unit_cost = 12</text:span> to a Product-like card.</text:p>
        </text:list-item>
        <text:list-item>
          <text:p text:style-name="P27">User can add <text:span text:style-name="Source_20_Text">production_quantity</text:span> as a decision_ref-like property.</text:p>
        </text:list-item>
        <text:list-item>
          <text:p text:style-name="P27">Properties appear on the card or in compact form.</text:p>
        </text:list-item>
        <text:list-item>
          <text:p text:style-name="P27">Properties are fully editable in the inspector.</text:p>
        </text:list-item>
        <text:list-item>
          <text:p text:style-name="P27">Properties survive refresh.</text:p>
        </text:list-item>
        <text:list-item>
          <text:p text:style-name="P27">Existing tags and card operations still work.</text:p>
        </text:list-item>
      </text:list>
      <text:p text:style-name="Text_20_body">Constraints:</text:p>
      <text:list xml:id="list3653826507" text:style-name="L25">
        <text:list-item>
          <text:p text:style-name="P28">Do not implement full expression parsing yet.</text:p>
        </text:list-item>
        <text:list-item>
          <text:p text:style-name="P28">Do not implement CVXPY logic yet.</text:p>
        </text:list-item>
        <text:list-item>
          <text:p text:style-name="P28">Keep property model extensible.</text:p>
        </text:list-item>
        <text:list-item>
          <text:p text:style-name="P28"><text:soft-page-break/>Preserve existing functionality.</text:p>
        </text:list-item>
      </text:list>
      <text:p text:style-name="P4"/>
      <text:p text:style-name="P45">Batch 2 / Prompt 3 — Card templates and template-based creation</text:p>
      <text:p text:style-name="Text_20_body">Context:<text:line-break/>Users should not manually recreate the same properties and tags for every card. Atlas needs templates: a Product template, Decision template, Data template, Function template, etc. Templates should be editable later, but for now they can be defined in code and used for card creation.</text:p>
      <text:p text:style-name="Text_20_body">Current state:<text:line-break/>Cards support typed tags and editable properties.</text:p>
      <text:p text:style-name="Text_20_body">Goal:<text:line-break/>Implement a simple card template system.</text:p>
      <text:p text:style-name="Text_20_body">Detailed requirements:</text:p>
      <text:list xml:id="list1288524436" text:style-name="L26">
        <text:list-item>
          <text:p text:style-name="P29">Define a <text:span text:style-name="Source_20_Text">CardTemplate</text:span> model:</text:p>
          <text:list>
            <text:list-item>
              <text:p text:style-name="P29">id</text:p>
            </text:list-item>
            <text:list-item>
              <text:p text:style-name="P29">name</text:p>
            </text:list-item>
            <text:list-item>
              <text:p text:style-name="P29">cardType</text:p>
            </text:list-item>
            <text:list-item>
              <text:p text:style-name="P29">defaultTags</text:p>
            </text:list-item>
            <text:list-item>
              <text:p text:style-name="P29">defaultProperties</text:p>
            </text:list-item>
            <text:list-item>
              <text:p text:style-name="P29">description</text:p>
            </text:list-item>
          </text:list>
        </text:list-item>
        <text:list-item>
          <text:p text:style-name="P29">Add a template picker to the create-card flow.</text:p>
        </text:list-item>
        <text:list-item>
          <text:p text:style-name="P29">Include generic starter templates:</text:p>
          <text:list>
            <text:list-item>
              <text:p text:style-name="P29">Generic Object</text:p>
            </text:list-item>
            <text:list-item>
              <text:p text:style-name="P29">Generic Decision</text:p>
            </text:list-item>
            <text:list-item>
              <text:p text:style-name="P29">Generic Data Source</text:p>
            </text:list-item>
            <text:list-item>
              <text:p text:style-name="P29">Generic Function</text:p>
            </text:list-item>
            <text:list-item>
              <text:p text:style-name="P29">Generic Constraint</text:p>
            </text:list-item>
            <text:list-item>
              <text:p text:style-name="P29">Generic Objective</text:p>
            </text:list-item>
            <text:list-item>
              <text:p text:style-name="P29">Product-like Object</text:p>
            </text:list-item>
          </text:list>
        </text:list-item>
        <text:list-item>
          <text:p text:style-name="P29">The Product-like Object template may include generic properties:</text:p>
          <text:list>
            <text:list-item>
              <text:p text:style-name="P29">unit_cost</text:p>
            </text:list-item>
            <text:list-item>
              <text:p text:style-name="P29">demand</text:p>
            </text:list-item>
            <text:list-item>
              <text:p text:style-name="P29">production_quantity</text:p>
            </text:list-item>
            <text:list-item>
              <text:p text:style-name="P29"><text:soft-page-break/>machine_hours_per_unit</text:p>
            </text:list-item>
          </text:list>
        </text:list-item>
        <text:list-item>
          <text:p text:style-name="P29">The Product-like template should remain an example, not a hard-coded domain engine.</text:p>
        </text:list-item>
        <text:list-item>
          <text:p text:style-name="P29">Creating a card from a template copies tags/properties into the new card.</text:p>
        </text:list-item>
        <text:list-item>
          <text:p text:style-name="P29">Persist created cards normally.</text:p>
        </text:list-item>
        <text:list-item>
          <text:p text:style-name="P29">Show template description in the picker.</text:p>
        </text:list-item>
      </text:list>
      <text:p text:style-name="Text_20_body">Testing:</text:p>
      <text:list xml:id="list3492060023" text:style-name="L27">
        <text:list-item>
          <text:p text:style-name="P30">Add tests that creating from a template copies tags and properties.</text:p>
        </text:list-item>
        <text:list-item>
          <text:p text:style-name="P30">Add tests that template-created cards remain independent after creation.</text:p>
        </text:list-item>
        <text:list-item>
          <text:p text:style-name="P30">Run lint/typecheck/build.</text:p>
        </text:list-item>
      </text:list>
      <text:p text:style-name="Text_20_body">Acceptance criteria:</text:p>
      <text:list xml:id="list4007896363" text:style-name="L28">
        <text:list-item>
          <text:p text:style-name="P31">User can create a card from Generic Object.</text:p>
        </text:list-item>
        <text:list-item>
          <text:p text:style-name="P31">User can create a card from Product-like Object and gets useful starter properties.</text:p>
        </text:list-item>
        <text:list-item>
          <text:p text:style-name="P31">Editing one card does not mutate the template or other cards.</text:p>
        </text:list-item>
        <text:list-item>
          <text:p text:style-name="P31">Existing manual card creation still works or is replaced by template creation cleanly.</text:p>
        </text:list-item>
        <text:list-item>
          <text:p text:style-name="P31">Existing tags/properties still work.</text:p>
        </text:list-item>
      </text:list>
      <text:p text:style-name="Text_20_body">Constraints:</text:p>
      <text:list xml:id="list2340794281" text:style-name="L29">
        <text:list-item>
          <text:p text:style-name="P32">Do not make templates mandatory for all future modeling logic.</text:p>
        </text:list-item>
        <text:list-item>
          <text:p text:style-name="P32">Do not add many domain archetypes yet.</text:p>
        </text:list-item>
        <text:list-item>
          <text:p text:style-name="P32">Keep templates simple and serializable.</text:p>
        </text:list-item>
        <text:list-item>
          <text:p text:style-name="P32">Preserve existing functionality.</text:p>
        </text:list-item>
      </text:list>
      <text:p text:style-name="P4"/>
      <text:p text:style-name="P4"/>
      <text:p text:style-name="P45">Batch 2 / Prompt 4 — Workbench grouping and visual clustering</text:p>
      <text:p text:style-name="Text_20_body">Context:<text:line-break/>Users will place many cards on the desk. They need simple visual organization before we implement deep optimization logic. Grouping/clustering should help them organize products, factories, decisions, data sources, functions, objectives, and constraints.</text:p>
      <text:p text:style-name="Text_20_body">Current state:<text:line-break/>The app has draggable cards with tags, properties, and templates.</text:p>
      <text:p text:style-name="Text_20_body"><text:soft-page-break/>Goal:<text:line-break/>Implement lightweight visual grouping/clustering on the workbench.</text:p>
      <text:p text:style-name="Text_20_body">Detailed requirements:</text:p>
      <text:list xml:id="list1865414136" text:style-name="L30">
        <text:list-item>
          <text:p text:style-name="P33">Allow users to create a visual group/cluster region on the workbench.</text:p>
        </text:list-item>
        <text:list-item>
          <text:p text:style-name="P33">A group should have:</text:p>
          <text:list>
            <text:list-item>
              <text:p text:style-name="P33">id</text:p>
            </text:list-item>
            <text:list-item>
              <text:p text:style-name="P33">title</text:p>
            </text:list-item>
            <text:list-item>
              <text:p text:style-name="P33">position</text:p>
            </text:list-item>
            <text:list-item>
              <text:p text:style-name="P33">size</text:p>
            </text:list-item>
            <text:list-item>
              <text:p text:style-name="P33">optional color/style</text:p>
            </text:list-item>
            <text:list-item>
              <text:p text:style-name="P33">notes</text:p>
            </text:list-item>
          </text:list>
        </text:list-item>
        <text:list-item>
          <text:p text:style-name="P33">Cards can be visually inside groups by position.</text:p>
        </text:list-item>
        <text:list-item>
          <text:p text:style-name="P33">Do not require complex parent-child semantics yet.</text:p>
        </text:list-item>
        <text:list-item>
          <text:p text:style-name="P33">Allow selecting and editing group title/notes in the inspector.</text:p>
        </text:list-item>
        <text:list-item>
          <text:p text:style-name="P33">Allow resizing or at least changing group size through inspector.</text:p>
        </text:list-item>
        <text:list-item>
          <text:p text:style-name="P33">Allow deleting a group without deleting cards.</text:p>
        </text:list-item>
        <text:list-item>
          <text:p text:style-name="P33">Persist groups in local storage.</text:p>
        </text:list-item>
        <text:list-item>
          <text:p text:style-name="P33">Make groups visually subtle and professional.</text:p>
        </text:list-item>
        <text:list-item>
          <text:p text:style-name="P33">Groups should not interfere with card dragging/selection.</text:p>
        </text:list-item>
      </text:list>
      <text:p text:style-name="Text_20_body">Testing:</text:p>
      <text:list xml:id="list234226509" text:style-name="L31">
        <text:list-item>
          <text:p text:style-name="P34">Add tests for group creation/deletion state helpers.</text:p>
        </text:list-item>
        <text:list-item>
          <text:p text:style-name="P34">Add render test if feasible.</text:p>
        </text:list-item>
        <text:list-item>
          <text:p text:style-name="P34">Run lint/typecheck/build.</text:p>
        </text:list-item>
      </text:list>
      <text:p text:style-name="Text_20_body">Acceptance criteria:</text:p>
      <text:list xml:id="list2657436678" text:style-name="L32">
        <text:list-item>
          <text:p text:style-name="P35">User can create a group called “Factory A”.</text:p>
        </text:list-item>
        <text:list-item>
          <text:p text:style-name="P35">User can place product cards visually inside it.</text:p>
        </text:list-item>
        <text:list-item>
          <text:p text:style-name="P35">Group persists after refresh.</text:p>
        </text:list-item>
        <text:list-item>
          <text:p text:style-name="P35">Deleting group leaves cards intact.</text:p>
        </text:list-item>
        <text:list-item>
          <text:p text:style-name="P35">Card interactions remain usable.</text:p>
        </text:list-item>
      </text:list>
      <text:p text:style-name="Text_20_body">Constraints:</text:p>
      <text:list xml:id="list4142528204" text:style-name="L33">
        <text:list-item>
          <text:p text:style-name="P36">Do not implement semantic group membership yet.</text:p>
        </text:list-item>
        <text:list-item>
          <text:p text:style-name="P36">Do not replace typed tags with groups.</text:p>
        </text:list-item>
        <text:list-item>
          <text:p text:style-name="P36"><text:soft-page-break/>Keep visual grouping separate from query logic for now.</text:p>
        </text:list-item>
        <text:list-item>
          <text:p text:style-name="P36">Preserve existing functionality.</text:p>
        </text:list-item>
      </text:list>
      <text:p text:style-name="P4"/>
      <text:p text:style-name="P4">BATCH 3</text:p>
      <text:p text:style-name="P46">Batch 3 / Prompt 1 — Query builder for selecting cards by typed tags</text:p>
      <text:p text:style-name="Text_20_body">Context:<text:line-break/>Atlas uses query-based indexing. Instead of manually wiring every object into a sum or constraint, users select cards by typed tags such as <text:span text:style-name="Source_20_Text">type = product</text:span> and <text:span text:style-name="Source_20_Text">factory = A</text:span>. Query results should be visible and reliable because indexing mistakes are a major source of optimization errors.</text:p>
      <text:p text:style-name="Text_20_body">Current state:<text:line-break/>Cards support typed tags, editable properties, templates, and visual grouping.</text:p>
      <text:p text:style-name="Text_20_body">Goal:<text:line-break/>Implement a basic query builder and live query highlighting.</text:p>
      <text:p text:style-name="Text_20_body">Detailed requirements:</text:p>
      <text:list xml:id="list394141193" text:style-name="L46">
        <text:list-item>
          <text:p text:style-name="P48">Define a simple <text:span text:style-name="Source_20_Text">CardQuery</text:span> model:</text:p>
          <text:list>
            <text:list-item>
              <text:p text:style-name="P48">id</text:p>
            </text:list-item>
            <text:list-item>
              <text:p text:style-name="P48">name</text:p>
            </text:list-item>
            <text:list-item>
              <text:p text:style-name="P48">includeTags: list of <text:span text:style-name="Source_20_Text">{ key, value }</text:span></text:p>
            </text:list-item>
            <text:list-item>
              <text:p text:style-name="P48">excludeTags: list of <text:span text:style-name="Source_20_Text">{ key, value }</text:span></text:p>
            </text:list-item>
          </text:list>
        </text:list-item>
        <text:list-item>
          <text:p text:style-name="P48">Implement query evaluation over all cards.</text:p>
        </text:list-item>
        <text:list-item>
          <text:p text:style-name="P48">Add a Query Builder panel or inspector section.</text:p>
        </text:list-item>
        <text:list-item>
          <text:p text:style-name="P48">Allow users to create, edit, duplicate, and delete named queries.</text:p>
        </text:list-item>
        <text:list-item>
          <text:p text:style-name="P48">Allow include and exclude tag conditions.</text:p>
        </text:list-item>
        <text:list-item>
          <text:p text:style-name="P48">Show the list/count of matching cards.</text:p>
        </text:list-item>
        <text:list-item>
          <text:p text:style-name="P48">Highlight matching cards on the workbench when a query is selected.</text:p>
        </text:list-item>
        <text:list-item>
          <text:p text:style-name="P48">Use AND semantics for include tags for now.</text:p>
        </text:list-item>
        <text:list-item>
          <text:p text:style-name="P48">Use exclusion semantics for exclude tags.</text:p>
        </text:list-item>
        <text:list-item>
          <text:p text:style-name="P48">Persist queries in local storage.</text:p>
        </text:list-item>
        <text:list-item>
          <text:p text:style-name="P48">Keep query logic independent from visual groups.</text:p>
        </text:list-item>
      </text:list>
      <text:p text:style-name="Text_20_body">Testing:</text:p>
      <text:list xml:id="list3913518984" text:style-name="L47">
        <text:list-item>
          <text:p text:style-name="P49"><text:soft-page-break/>Add unit tests for query evaluation:</text:p>
          <text:list>
            <text:list-item>
              <text:p text:style-name="P49">include one tag</text:p>
            </text:list-item>
            <text:list-item>
              <text:p text:style-name="P49">include multiple tags</text:p>
            </text:list-item>
            <text:list-item>
              <text:p text:style-name="P49">exclude tag</text:p>
            </text:list-item>
            <text:list-item>
              <text:p text:style-name="P49">no matches</text:p>
            </text:list-item>
            <text:list-item>
              <text:p text:style-name="P49">cards with missing tags</text:p>
            </text:list-item>
          </text:list>
        </text:list-item>
        <text:list-item>
          <text:p text:style-name="P49">Add UI/render test if feasible.</text:p>
        </text:list-item>
        <text:list-item>
          <text:p text:style-name="P49">Run lint/typecheck/build.</text:p>
        </text:list-item>
      </text:list>
      <text:p text:style-name="Text_20_body">Acceptance criteria:</text:p>
      <text:list xml:id="list3786732478" text:style-name="L48">
        <text:list-item>
          <text:p text:style-name="P50">User can define query <text:span text:style-name="Source_20_Text">type = product</text:span>.</text:p>
        </text:list-item>
        <text:list-item>
          <text:p text:style-name="P50">User can define query <text:span text:style-name="Source_20_Text">type = product AND factory = A</text:span>.</text:p>
        </text:list-item>
        <text:list-item>
          <text:p text:style-name="P50">Selecting a query highlights matching cards.</text:p>
        </text:list-item>
        <text:list-item>
          <text:p text:style-name="P50">Query result count is shown.</text:p>
        </text:list-item>
        <text:list-item>
          <text:p text:style-name="P50">Queries persist after refresh.</text:p>
        </text:list-item>
        <text:list-item>
          <text:p text:style-name="P50">Existing cards, tags, properties, templates, and groups still work.</text:p>
        </text:list-item>
      </text:list>
      <text:p text:style-name="Text_20_body">Constraints:</text:p>
      <text:list xml:id="list3320593561" text:style-name="L49">
        <text:list-item>
          <text:p text:style-name="P51">Do not implement formulas yet.</text:p>
        </text:list-item>
        <text:list-item>
          <text:p text:style-name="P51">Do not implement solver logic yet.</text:p>
        </text:list-item>
        <text:list-item>
          <text:p text:style-name="P51">Do not make groups part of query semantics yet.</text:p>
        </text:list-item>
        <text:list-item>
          <text:p text:style-name="P51">Preserve existing functionality.</text:p>
        </text:list-item>
      </text:list>
      <text:p text:style-name="P46"/>
      <text:p text:style-name="P4"/>
      <text:p text:style-name="P45">Batch 3 / Prompt 2 — Property selector and expression reference UI</text:p>
      <text:p text:style-name="Text_20_body">Context:<text:line-break/>Tagged functions need to refer to properties of cards selected by a query. For example: sum <text:span text:style-name="Source_20_Text">unit_cost * production_quantity</text:span> over all cards with <text:span text:style-name="Source_20_Text">type = product</text:span> and <text:span text:style-name="Source_20_Text">factory = A</text:span>. Before implementing full expression parsing, we need a clean way to select properties and build simple expression references.</text:p>
      <text:p text:style-name="Text_20_body">Current state:<text:line-break/>Cards have typed tags/properties and queries can select cards by tags.</text:p>
      <text:p text:style-name="Text_20_body">Goal:<text:line-break/>Implement reusable property selection UI and simple expression reference structures.</text:p>
      <text:p text:style-name="Text_20_body"><text:soft-page-break/>Detailed requirements:</text:p>
      <text:list xml:id="list2369406149" text:style-name="L38">
        <text:list-item>
          <text:p text:style-name="P37">Define a simple expression model suitable for the current prototype:</text:p>
          <text:list>
            <text:list-item>
              <text:p text:style-name="P37">literal</text:p>
            </text:list-item>
            <text:list-item>
              <text:p text:style-name="P37">property_ref</text:p>
            </text:list-item>
            <text:list-item>
              <text:p text:style-name="P37">multiply</text:p>
            </text:list-item>
            <text:list-item>
              <text:p text:style-name="P37">add</text:p>
            </text:list-item>
            <text:list-item>
              <text:p text:style-name="P37">sum later</text:p>
            </text:list-item>
          </text:list>
        </text:list-item>
        <text:list-item>
          <text:p text:style-name="P37">For this task, implement UI helpers for choosing:</text:p>
          <text:list>
            <text:list-item>
              <text:p text:style-name="P37">a query</text:p>
            </text:list-item>
            <text:list-item>
              <text:p text:style-name="P37">a property name from matching cards</text:p>
            </text:list-item>
          </text:list>
        </text:list-item>
        <text:list-item>
          <text:p text:style-name="P37">When a query is selected, show available property names found among matching cards.</text:p>
        </text:list-item>
        <text:list-item>
          <text:p text:style-name="P37">Show warnings if not all matching cards have the selected property.</text:p>
        </text:list-item>
        <text:list-item>
          <text:p text:style-name="P37">Add a small expression preview component that can display:</text:p>
          <text:list>
            <text:list-item>
              <text:p text:style-name="P37">property name</text:p>
            </text:list-item>
            <text:list-item>
              <text:p text:style-name="P37">literal</text:p>
            </text:list-item>
            <text:list-item>
              <text:p text:style-name="P37">property × property</text:p>
            </text:list-item>
            <text:list-item>
              <text:p text:style-name="P37">property × literal</text:p>
            </text:list-item>
          </text:list>
        </text:list-item>
        <text:list-item>
          <text:p text:style-name="P37">Do not need full arbitrary expression editing yet.</text:p>
        </text:list-item>
        <text:list-item>
          <text:p text:style-name="P37">Store expression references in JSON.</text:p>
        </text:list-item>
      </text:list>
      <text:p text:style-name="Text_20_body">Testing:</text:p>
      <text:list xml:id="list3924659874" text:style-name="L39">
        <text:list-item>
          <text:p text:style-name="P38">Add unit tests that collect available property names from query matches.</text:p>
        </text:list-item>
        <text:list-item>
          <text:p text:style-name="P38">Add tests for detecting missing properties among query results.</text:p>
        </text:list-item>
        <text:list-item>
          <text:p text:style-name="P38">Add tests for expression preview serialization if helpers exist.</text:p>
        </text:list-item>
        <text:list-item>
          <text:p text:style-name="P38">Run lint/typecheck/build.</text:p>
        </text:list-item>
      </text:list>
      <text:p text:style-name="Text_20_body">Acceptance criteria:</text:p>
      <text:list xml:id="list2888354703" text:style-name="L40">
        <text:list-item>
          <text:p text:style-name="P39">Selecting query <text:span text:style-name="Source_20_Text">type = product</text:span> shows properties such as <text:span text:style-name="Source_20_Text">unit_cost</text:span>, <text:span text:style-name="Source_20_Text">demand</text:span>, <text:span text:style-name="Source_20_Text">production_quantity</text:span> if present.</text:p>
        </text:list-item>
        <text:list-item>
          <text:p text:style-name="P39">The UI warns if one selected product lacks <text:span text:style-name="Source_20_Text">unit_cost</text:span>.</text:p>
        </text:list-item>
        <text:list-item>
          <text:p text:style-name="P39">Simple expression previews render clearly.</text:p>
        </text:list-item>
        <text:list-item>
          <text:p text:style-name="P39">All data remains serializable.</text:p>
        </text:list-item>
        <text:list-item>
          <text:p text:style-name="P39">Existing query highlighting still works.</text:p>
        </text:list-item>
      </text:list>
      <text:p text:style-name="Text_20_body">Constraints:</text:p>
      <text:list xml:id="list3475484564" text:style-name="L41">
        <text:list-item>
          <text:p text:style-name="P40"><text:soft-page-break/>Do not build a full parser yet.</text:p>
        </text:list-item>
        <text:list-item>
          <text:p text:style-name="P40">Do not evaluate expressions yet.</text:p>
        </text:list-item>
        <text:list-item>
          <text:p text:style-name="P40">Do not connect to CVXPY yet.</text:p>
        </text:list-item>
        <text:list-item>
          <text:p text:style-name="P40">Preserve existing functionality.</text:p>
        </text:list-item>
      </text:list>
      <text:p text:style-name="P4"/>
      <text:p text:style-name="P45">Batch 3 / Prompt 3 — Function cards and TaggedSum</text:p>
      <text:p text:style-name="Text_20_body">Context:<text:line-break/>Functions are first-class cards in Atlas. The first critical function is <text:span text:style-name="Source_20_Text">TaggedSum</text:span>: select cards by query, evaluate an expression on each selected card, and sum the result. This is the core mechanism for semantic indexing.</text:p>
      <text:p text:style-name="Text_20_body">Current state:<text:line-break/>Cards, typed tags, properties, templates, queries, and property selectors exist.</text:p>
      <text:p text:style-name="Text_20_body">Goal:<text:line-break/>Implement Function cards with a working <text:span text:style-name="Source_20_Text">TaggedSum</text:span> configuration.</text:p>
      <text:p text:style-name="Text_20_body">Detailed requirements:</text:p>
      <text:list xml:id="list1708459377" text:style-name="L42">
        <text:list-item>
          <text:p text:style-name="P41">Extend Function cards with a <text:span text:style-name="Source_20_Text">functionKind</text:span> field.</text:p>
        </text:list-item>
        <text:list-item>
          <text:p text:style-name="P41">Implement <text:span text:style-name="Source_20_Text">TaggedSum</text:span> as the first function kind.</text:p>
        </text:list-item>
        <text:list-item>
          <text:p text:style-name="P41">A TaggedSum card should store:</text:p>
          <text:list>
            <text:list-item>
              <text:p text:style-name="P41">selected query id</text:p>
            </text:list-item>
            <text:list-item>
              <text:p text:style-name="P41">expression over selected cards</text:p>
            </text:list-item>
            <text:list-item>
              <text:p text:style-name="P41">display name</text:p>
            </text:list-item>
            <text:list-item>
              <text:p text:style-name="P41">optional description</text:p>
            </text:list-item>
          </text:list>
        </text:list-item>
        <text:list-item>
          <text:p text:style-name="P41">Support simple expressions initially:</text:p>
          <text:list>
            <text:list-item>
              <text:p text:style-name="P41">selected property</text:p>
            </text:list-item>
            <text:list-item>
              <text:p text:style-name="P41">selected property × selected property</text:p>
            </text:list-item>
            <text:list-item>
              <text:p text:style-name="P41">selected property × numeric literal</text:p>
            </text:list-item>
          </text:list>
        </text:list-item>
        <text:list-item>
          <text:p text:style-name="P41">Add inspector UI for configuring a TaggedSum card.</text:p>
        </text:list-item>
        <text:list-item>
          <text:p text:style-name="P41">Show a compact preview on the Function card:</text:p>
          <text:list>
            <text:list-item>
              <text:p text:style-name="P41">query name</text:p>
            </text:list-item>
            <text:list-item>
              <text:p text:style-name="P41">expression</text:p>
            </text:list-item>
            <text:list-item>
              <text:p text:style-name="P41">number of matched cards</text:p>
            </text:list-item>
          </text:list>
        </text:list-item>
        <text:list-item>
          <text:p text:style-name="P41">Selecting the TaggedSum card highlights all matching cards.</text:p>
        </text:list-item>
        <text:list-item>
          <text:p text:style-name="P41"><text:soft-page-break/>If selected properties are missing on some matching cards, show a warning.</text:p>
        </text:list-item>
        <text:list-item>
          <text:p text:style-name="P41">Persist configuration in local storage.</text:p>
        </text:list-item>
      </text:list>
      <text:p text:style-name="Text_20_body">Testing:</text:p>
      <text:list xml:id="list4239713477" text:style-name="L43">
        <text:list-item>
          <text:p text:style-name="P42">Add unit tests for TaggedSum configuration helpers.</text:p>
        </text:list-item>
        <text:list-item>
          <text:p text:style-name="P42">Add tests for missing-property diagnostics.</text:p>
        </text:list-item>
        <text:list-item>
          <text:p text:style-name="P42">Add render/UI tests if feasible.</text:p>
        </text:list-item>
        <text:list-item>
          <text:p text:style-name="P42">Run lint/typecheck/build.</text:p>
        </text:list-item>
      </text:list>
      <text:p text:style-name="Text_20_body">Acceptance criteria:</text:p>
      <text:list xml:id="list990403059" text:style-name="L44">
        <text:list-item>
          <text:p text:style-name="P43">User can create a Function card of kind TaggedSum.</text:p>
        </text:list-item>
        <text:list-item>
          <text:p text:style-name="P43">User can set query <text:span text:style-name="Source_20_Text">type = product AND factory = A</text:span>.</text:p>
        </text:list-item>
        <text:list-item>
          <text:p text:style-name="P43">User can set expression <text:span text:style-name="Source_20_Text">unit_cost * production_quantity</text:span>.</text:p>
        </text:list-item>
        <text:list-item>
          <text:p text:style-name="P43">Matching product cards are highlighted when the function is selected.</text:p>
        </text:list-item>
        <text:list-item>
          <text:p text:style-name="P43">Missing properties are reported clearly.</text:p>
        </text:list-item>
        <text:list-item>
          <text:p text:style-name="P43">Existing query builder and property selector still work.</text:p>
        </text:list-item>
      </text:list>
      <text:p text:style-name="Text_20_body">Constraints:</text:p>
      <text:list xml:id="list2730642309" text:style-name="L45">
        <text:list-item>
          <text:p text:style-name="P44">Do not implement numerical evaluation yet.</text:p>
        </text:list-item>
        <text:list-item>
          <text:p text:style-name="P44">Do not implement CVXPY solving yet.</text:p>
        </text:list-item>
        <text:list-item>
          <text:p text:style-name="P44">Keep expression model simple and extensible.</text:p>
        </text:list-item>
        <text:list-item>
          <text:p text:style-name="P44">Preserve existing functionality.</text:p>
        </text:list-item>
      </text:list>
      <text:p text:style-name="P4"/>
      <text:p text:style-name="P45">Batch 3 / Prompt 4 — Dependency highlighting from functions to cards and properties</text:p>
      <text:p text:style-name="Text_20_body">Context:<text:line-break/>A major UX goal is making indexing and dependencies visible. Selecting any function should show which cards and properties it depends on. This makes query-based modeling safer than code.</text:p>
      <text:p text:style-name="Text_20_body">Current state:<text:line-break/>TaggedSum function cards can be configured with a query and expression.</text:p>
      <text:p text:style-name="Text_20_body">Goal:<text:line-break/>Implement dependency visualization for function cards.</text:p>
      <text:p text:style-name="Text_20_body">Detailed requirements:</text:p>
      <text:list xml:id="list2205375527" text:style-name="L50">
        <text:list-item>
          <text:p text:style-name="P52">When a Function card is selected:</text:p>
          <text:list>
            <text:list-item>
              <text:p text:style-name="P52">highlight all matching cards from its query</text:p>
            </text:list-item>
            <text:list-item>
              <text:p text:style-name="P52"><text:soft-page-break/>visually mark the specific properties used in its expression on those cards</text:p>
            </text:list-item>
            <text:list-item>
              <text:p text:style-name="P52">show a dependency summary in the inspector</text:p>
            </text:list-item>
          </text:list>
        </text:list-item>
        <text:list-item>
          <text:p text:style-name="P52">Use subtle arrows or dependency lines from participating cards to the Function card if the current graph/canvas library supports it cleanly.</text:p>
        </text:list-item>
        <text:list-item>
          <text:p text:style-name="P52">If dependency lines are too expensive or unstable, implement property/card highlighting first and document dependency lines as future work.</text:p>
        </text:list-item>
        <text:list-item>
          <text:p text:style-name="P52">The dependency summary should show:</text:p>
          <text:list>
            <text:list-item>
              <text:p text:style-name="P52">query</text:p>
            </text:list-item>
            <text:list-item>
              <text:p text:style-name="P52">matched card count</text:p>
            </text:list-item>
            <text:list-item>
              <text:p text:style-name="P52">used properties</text:p>
            </text:list-item>
            <text:list-item>
              <text:p text:style-name="P52">missing properties</text:p>
            </text:list-item>
          </text:list>
        </text:list-item>
        <text:list-item>
          <text:p text:style-name="P52">Add a toggle to enable/disable dependency highlighting if useful.</text:p>
        </text:list-item>
        <text:list-item>
          <text:p text:style-name="P52">Keep highlighting transient; it should not mutate card data.</text:p>
        </text:list-item>
      </text:list>
      <text:p text:style-name="Text_20_body">Testing:</text:p>
      <text:list xml:id="list1868721658" text:style-name="L51">
        <text:list-item>
          <text:p text:style-name="P53">Add unit tests for dependency extraction from a Function card.</text:p>
        </text:list-item>
        <text:list-item>
          <text:p text:style-name="P53">Add tests for missing property detection.</text:p>
        </text:list-item>
        <text:list-item>
          <text:p text:style-name="P53">Add component tests if feasible.</text:p>
        </text:list-item>
        <text:list-item>
          <text:p text:style-name="P53">Run lint/typecheck/build.</text:p>
        </text:list-item>
      </text:list>
      <text:p text:style-name="Text_20_body">Acceptance criteria:</text:p>
      <text:list xml:id="list801652280" text:style-name="L52">
        <text:list-item>
          <text:p text:style-name="P54">Selecting a TaggedSum visually reveals all cards it touches.</text:p>
        </text:list-item>
        <text:list-item>
          <text:p text:style-name="P54">The used properties are visible or clearly listed.</text:p>
        </text:list-item>
        <text:list-item>
          <text:p text:style-name="P54">Missing properties are easy to diagnose.</text:p>
        </text:list-item>
        <text:list-item>
          <text:p text:style-name="P54">Deselecting the function removes transient highlights.</text:p>
        </text:list-item>
        <text:list-item>
          <text:p text:style-name="P54">Existing card editing and query functionality remain stable.</text:p>
        </text:list-item>
      </text:list>
      <text:p text:style-name="Text_20_body">Constraints:</text:p>
      <text:list xml:id="list59307485" text:style-name="L53">
        <text:list-item>
          <text:p text:style-name="P55">Do not over-engineer graph lines if highlighting is enough.</text:p>
        </text:list-item>
        <text:list-item>
          <text:p text:style-name="P55">Do not store transient highlights in persistent model state unless necessary.</text:p>
        </text:list-item>
        <text:list-item>
          <text:p text:style-name="P55">Preserve existing functionality.</text:p>
        </text:list-item>
      </text:list>
      <text:p text:style-name="P4"/>
      <text:p text:style-name="P4">BATCH 4</text:p>
      <text:p text:style-name="P6"><text:soft-page-break/></text:p>
      <text:p text:style-name="P45">Batch 4 / Prompt 1 — Objective cards and objective term editor</text:p>
      <text:p text:style-name="Text_20_body">Context:<text:line-break/>Atlas represents objectives as first-class modeling objects. An objective consists of one or more objective terms. Each objective term references one or more Function cards (initially TaggedSum). Objectives remain visible in the bottom dock and become the central optimization target.</text:p>
      <text:p text:style-name="Text_20_body">Current state:<text:line-break/>The app supports cards, typed tags, templates, queries, TaggedSum function cards, and dependency highlighting.</text:p>
      <text:p text:style-name="Text_20_body">Goal:<text:line-break/>Implement Objective cards with editable objective terms.</text:p>
      <text:p text:style-name="Text_20_body">Detailed requirements:</text:p>
      <text:list xml:id="list3320160137" text:style-name="L54">
        <text:list-item>
          <text:p text:style-name="P56">Extend Objective cards to contain:</text:p>
          <text:list>
            <text:list-item>
              <text:p text:style-name="P56">optimization direction (Minimize / Maximize)</text:p>
            </text:list-item>
            <text:list-item>
              <text:p text:style-name="P56">ordered list of objective terms</text:p>
            </text:list-item>
            <text:list-item>
              <text:p text:style-name="P56">notes</text:p>
            </text:list-item>
          </text:list>
        </text:list-item>
        <text:list-item>
          <text:p text:style-name="P56">Each objective term should reference an existing Function card.</text:p>
        </text:list-item>
        <text:list-item>
          <text:p text:style-name="P56">Allow:</text:p>
          <text:list>
            <text:list-item>
              <text:p text:style-name="P56">add term</text:p>
            </text:list-item>
            <text:list-item>
              <text:p text:style-name="P56">remove term</text:p>
            </text:list-item>
            <text:list-item>
              <text:p text:style-name="P56">reorder terms</text:p>
            </text:list-item>
            <text:list-item>
              <text:p text:style-name="P56">rename terms</text:p>
            </text:list-item>
          </text:list>
        </text:list-item>
        <text:list-item>
          <text:p text:style-name="P56">Display the objective structure compactly on the Objective card.</text:p>
        </text:list-item>
        <text:list-item>
          <text:p text:style-name="P56">Bottom dock should show all Objective cards.</text:p>
        </text:list-item>
        <text:list-item>
          <text:p text:style-name="P56">Selecting an Objective card highlights all referenced Function cards.</text:p>
        </text:list-item>
        <text:list-item>
          <text:p text:style-name="P56">Selecting an objective term highlights:</text:p>
          <text:list>
            <text:list-item>
              <text:p text:style-name="P56">referenced Function cards</text:p>
            </text:list-item>
            <text:list-item>
              <text:p text:style-name="P56">participating Object cards</text:p>
            </text:list-item>
          </text:list>
        </text:list-item>
        <text:list-item>
          <text:p text:style-name="P56">Show dependency summary in the inspector.</text:p>
        </text:list-item>
      </text:list>
      <text:p text:style-name="Text_20_body">Testing:</text:p>
      <text:list xml:id="list2949325170" text:style-name="L55">
        <text:list-item>
          <text:p text:style-name="P57">Add unit tests for objective model manipulation.</text:p>
        </text:list-item>
        <text:list-item>
          <text:p text:style-name="P57">Add render tests if feasible.</text:p>
        </text:list-item>
        <text:list-item>
          <text:p text:style-name="P57">Run lint/typecheck/build.</text:p>
        </text:list-item>
      </text:list>
      <text:p text:style-name="Text_20_body">Acceptance criteria:</text:p>
      <text:list xml:id="list1410972885" text:style-name="L56">
        <text:list-item>
          <text:p text:style-name="P58"><text:soft-page-break/>User can create an Objective card.</text:p>
        </text:list-item>
        <text:list-item>
          <text:p text:style-name="P58">User can add multiple TaggedSum terms.</text:p>
        </text:list-item>
        <text:list-item>
          <text:p text:style-name="P58">Objective terms can be reordered.</text:p>
        </text:list-item>
        <text:list-item>
          <text:p text:style-name="P58">Objective dependencies highlight correctly.</text:p>
        </text:list-item>
        <text:list-item>
          <text:p text:style-name="P58">Existing Function cards continue working.</text:p>
        </text:list-item>
      </text:list>
      <text:p text:style-name="Text_20_body">Constraints:</text:p>
      <text:list xml:id="list1231506606" text:style-name="L57">
        <text:list-item>
          <text:p text:style-name="P59">Do not implement solving yet.</text:p>
        </text:list-item>
        <text:list-item>
          <text:p text:style-name="P59">Keep objective model generic.</text:p>
        </text:list-item>
        <text:list-item>
          <text:p text:style-name="P59">Preserve existing functionality.</text:p>
        </text:list-item>
      </text:list>
      <text:p text:style-name="P4"/>
      <text:p text:style-name="P46">Batch 4 / Prompt 2 — Constraint cards and visual constraint editor</text:p>
      <text:p text:style-name="Text_20_body">Context:<text:line-break/>Constraints are first-class objects in Atlas. A constraint consists of a left-hand expression, a relation, and a right-hand expression. Expressions initially reference Function cards or constants.</text:p>
      <text:p text:style-name="Text_20_body">Current state:<text:line-break/>Objective cards exist and Function cards expose TaggedSum expressions.</text:p>
      <text:p text:style-name="Text_20_body">Goal:<text:line-break/>Implement editable Constraint cards.</text:p>
      <text:p text:style-name="Text_20_body">Detailed requirements:</text:p>
      <text:list xml:id="list1020227641" text:style-name="L58">
        <text:list-item>
          <text:p text:style-name="P60">Extend Constraint cards with:</text:p>
          <text:list>
            <text:list-item>
              <text:p text:style-name="P60">left expression</text:p>
            </text:list-item>
            <text:list-item>
              <text:p text:style-name="P60">comparison operator</text:p>
              <text:list>
                <text:list-item>
                  <text:p text:style-name="P60">&lt;=</text:p>
                </text:list-item>
                <text:list-item>
                  <text:p text:style-name="P1">=</text:p>
                </text:list-item>
                <text:list-item>
                  <text:p text:style-name="P60">==</text:p>
                </text:list-item>
              </text:list>
            </text:list-item>
            <text:list-item>
              <text:p text:style-name="P60">right expression</text:p>
            </text:list-item>
            <text:list-item>
              <text:p text:style-name="P60">name</text:p>
            </text:list-item>
            <text:list-item>
              <text:p text:style-name="P60">notes</text:p>
            </text:list-item>
          </text:list>
        </text:list-item>
        <text:list-item>
          <text:p text:style-name="P60">Expressions should initially support:</text:p>
          <text:list>
            <text:list-item>
              <text:p text:style-name="P60">Function card reference</text:p>
            </text:list-item>
            <text:list-item>
              <text:p text:style-name="P60">numeric constant</text:p>
            </text:list-item>
          </text:list>
        </text:list-item>
        <text:list-item>
          <text:p text:style-name="P60"><text:soft-page-break/>Allow editing entirely through the inspector.</text:p>
        </text:list-item>
        <text:list-item>
          <text:p text:style-name="P60">Display compact mathematical preview on the Constraint card.</text:p>
        </text:list-item>
        <text:list-item>
          <text:p text:style-name="P60">Bottom dock should list all Constraint cards.</text:p>
        </text:list-item>
        <text:list-item>
          <text:p text:style-name="P60">Selecting a Constraint highlights:</text:p>
          <text:list>
            <text:list-item>
              <text:p text:style-name="P60">referenced Function cards</text:p>
            </text:list-item>
            <text:list-item>
              <text:p text:style-name="P60">participating cards</text:p>
            </text:list-item>
          </text:list>
        </text:list-item>
        <text:list-item>
          <text:p text:style-name="P60">Show dependency summary.</text:p>
        </text:list-item>
      </text:list>
      <text:p text:style-name="Text_20_body">Testing:</text:p>
      <text:list xml:id="list1452434485" text:style-name="L59">
        <text:list-item>
          <text:p text:style-name="P61">Add tests for constraint model creation/editing.</text:p>
        </text:list-item>
        <text:list-item>
          <text:p text:style-name="P61">Add UI tests if feasible.</text:p>
        </text:list-item>
        <text:list-item>
          <text:p text:style-name="P61">Run lint/typecheck/build.</text:p>
        </text:list-item>
      </text:list>
      <text:p text:style-name="Text_20_body">Acceptance criteria:</text:p>
      <text:list xml:id="list2794161369" text:style-name="L60">
        <text:list-item>
          <text:p text:style-name="P62">User can create multiple constraints.</text:p>
        </text:list-item>
        <text:list-item>
          <text:p text:style-name="P62">Constraint previews update immediately.</text:p>
        </text:list-item>
        <text:list-item>
          <text:p text:style-name="P62">Constraints appear in bottom dock.</text:p>
        </text:list-item>
        <text:list-item>
          <text:p text:style-name="P62">Dependency highlighting works.</text:p>
        </text:list-item>
        <text:list-item>
          <text:p text:style-name="P62">Existing Objective cards still work.</text:p>
        </text:list-item>
      </text:list>
      <text:p text:style-name="Text_20_body">Constraints:</text:p>
      <text:list xml:id="list3043144048" text:style-name="L61">
        <text:list-item>
          <text:p text:style-name="P63">Do not compile to CVXPY yet.</text:p>
        </text:list-item>
        <text:list-item>
          <text:p text:style-name="P63">Preserve existing functionality.</text:p>
        </text:list-item>
      </text:list>
      <text:p text:style-name="P6"/>
      <text:p text:style-name="P46">Batch 4 / Prompt 3 — Expression evaluation engine</text:p>
      <text:p text:style-name="Text_20_body">Context:<text:line-break/>Atlas should support evaluating expressions before optimization. This allows users to inspect formulas, debug models, and understand dependencies without solving.</text:p>
      <text:p text:style-name="Text_20_body">Current state:<text:line-break/>Objectives and Constraints reference TaggedSum Function cards.</text:p>
      <text:p text:style-name="Text_20_body">Goal:<text:line-break/>Implement a prototype evaluation engine.</text:p>
      <text:p text:style-name="Text_20_body">Detailed requirements:</text:p>
      <text:list xml:id="list988995712" text:style-name="L62">
        <text:list-item>
          <text:p text:style-name="P64">Create an evaluation subsystem separate from optimization.</text:p>
        </text:list-item>
        <text:list-item>
          <text:p text:style-name="P64">Support evaluation of:</text:p>
          <text:list>
            <text:list-item>
              <text:p text:style-name="P64">constants</text:p>
            </text:list-item>
            <text:list-item>
              <text:p text:style-name="P64"><text:soft-page-break/>property references</text:p>
            </text:list-item>
            <text:list-item>
              <text:p text:style-name="P64">multiplication</text:p>
            </text:list-item>
            <text:list-item>
              <text:p text:style-name="P64">TaggedSum</text:p>
            </text:list-item>
            <text:list-item>
              <text:p text:style-name="P64">objective terms</text:p>
            </text:list-item>
            <text:list-item>
              <text:p text:style-name="P64">objectives</text:p>
            </text:list-item>
            <text:list-item>
              <text:p text:style-name="P64">constraint left/right sides</text:p>
            </text:list-item>
          </text:list>
        </text:list-item>
        <text:list-item>
          <text:p text:style-name="P64">Evaluation should use:</text:p>
          <text:list>
            <text:list-item>
              <text:p text:style-name="P64">current property values</text:p>
            </text:list-item>
            <text:list-item>
              <text:p text:style-name="P64">initialization values</text:p>
            </text:list-item>
            <text:list-item>
              <text:p text:style-name="P64">manually assigned Decision values (temporary placeholders)</text:p>
            </text:list-item>
          </text:list>
        </text:list-item>
        <text:list-item>
          <text:p text:style-name="P64">Add "Evaluate" button in toolbar.</text:p>
        </text:list-item>
        <text:list-item>
          <text:p text:style-name="P64">Selecting any card should allow evaluating it.</text:p>
        </text:list-item>
        <text:list-item>
          <text:p text:style-name="P64">Inspector should display:</text:p>
          <text:list>
            <text:list-item>
              <text:p text:style-name="P64">current value</text:p>
            </text:list-item>
            <text:list-item>
              <text:p text:style-name="P64">evaluation diagnostics</text:p>
            </text:list-item>
          </text:list>
        </text:list-item>
        <text:list-item>
          <text:p text:style-name="P64">Missing values should generate readable diagnostics instead of crashes.</text:p>
        </text:list-item>
      </text:list>
      <text:p text:style-name="Text_20_body">Testing:</text:p>
      <text:list xml:id="list1574907639" text:style-name="L63">
        <text:list-item>
          <text:p text:style-name="P65">Add unit tests for evaluator.</text:p>
        </text:list-item>
        <text:list-item>
          <text:p text:style-name="P65">Test TaggedSum evaluation.</text:p>
        </text:list-item>
        <text:list-item>
          <text:p text:style-name="P65">Test missing property handling.</text:p>
        </text:list-item>
        <text:list-item>
          <text:p text:style-name="P65">Test invalid expressions.</text:p>
        </text:list-item>
        <text:list-item>
          <text:p text:style-name="P65">Run lint/typecheck/build.</text:p>
        </text:list-item>
      </text:list>
      <text:p text:style-name="Text_20_body">Acceptance criteria:</text:p>
      <text:list xml:id="list3206668048" text:style-name="L64">
        <text:list-item>
          <text:p text:style-name="P66">Clicking Evaluate computes values without optimization.</text:p>
        </text:list-item>
        <text:list-item>
          <text:p text:style-name="P66">Objective values are shown.</text:p>
        </text:list-item>
        <text:list-item>
          <text:p text:style-name="P66">Constraint left/right values are shown.</text:p>
        </text:list-item>
        <text:list-item>
          <text:p text:style-name="P66">Errors are explained clearly.</text:p>
        </text:list-item>
        <text:list-item>
          <text:p text:style-name="P66">Existing UI remains stable.</text:p>
        </text:list-item>
      </text:list>
      <text:p text:style-name="Text_20_body">Constraints:</text:p>
      <text:list xml:id="list308407241" text:style-name="L65">
        <text:list-item>
          <text:p text:style-name="P67">Keep evaluator independent from CVXPY.</text:p>
        </text:list-item>
        <text:list-item>
          <text:p text:style-name="P67">Preserve existing functionality.</text:p>
        </text:list-item>
      </text:list>
      <text:p text:style-name="P6"/>
      <text:p text:style-name="P6"><text:soft-page-break/></text:p>
      <text:p text:style-name="P6"/>
      <text:p text:style-name="P46">Batch 4 / Prompt 4 — Mathematical preview and symbolic representation</text:p>
      <text:p text:style-name="Text_20_body">Context:<text:line-break/>Atlas should always allow users to inspect what mathematical model they are building. Even before code generation, users should see symbolic expressions generated from cards, queries, and functions.</text:p>
      <text:p text:style-name="Text_20_body">Current state:<text:line-break/>Evaluation works and objectives/constraints are constructed visually.</text:p>
      <text:p text:style-name="Text_20_body">Goal:<text:line-break/>Implement symbolic mathematical previews.</text:p>
      <text:p text:style-name="Text_20_body">Detailed requirements:</text:p>
      <text:list xml:id="list1289714488" text:style-name="L66">
        <text:list-item>
          <text:p text:style-name="P68">Create a symbolic representation layer independent of CVXPY.</text:p>
        </text:list-item>
        <text:list-item>
          <text:p text:style-name="P68">Support symbolic rendering of:</text:p>
          <text:list>
            <text:list-item>
              <text:p text:style-name="P68">TaggedSum</text:p>
            </text:list-item>
            <text:list-item>
              <text:p text:style-name="P68">objective terms</text:p>
            </text:list-item>
            <text:list-item>
              <text:p text:style-name="P68">objectives</text:p>
            </text:list-item>
            <text:list-item>
              <text:p text:style-name="P68">constraints</text:p>
            </text:list-item>
          </text:list>
        </text:list-item>
        <text:list-item>
          <text:p text:style-name="P68">Display readable mathematical notation in the inspector.</text:p>
        </text:list-item>
        <text:list-item>
          <text:p text:style-name="P68">Example:<text:line-break/>Σ(unit_cost × production_quantity | type=product, factory=A)</text:p>
        </text:list-item>
        <text:list-item>
          <text:p text:style-name="P68">Allow expanding previews into more detailed forms showing participating objects.</text:p>
        </text:list-item>
        <text:list-item>
          <text:p text:style-name="P68">Add "Generated Mathematics" section to inspector.</text:p>
        </text:list-item>
        <text:list-item>
          <text:p text:style-name="P68">Keep representation backend-independent.</text:p>
        </text:list-item>
      </text:list>
      <text:p text:style-name="Text_20_body">Testing:</text:p>
      <text:list xml:id="list3189883040" text:style-name="L67">
        <text:list-item>
          <text:p text:style-name="P69">Add unit tests for symbolic rendering.</text:p>
        </text:list-item>
        <text:list-item>
          <text:p text:style-name="P69">Test rendering of several objective/constraint combinations.</text:p>
        </text:list-item>
        <text:list-item>
          <text:p text:style-name="P69">Run lint/typecheck/build.</text:p>
        </text:list-item>
      </text:list>
      <text:p text:style-name="Text_20_body">Acceptance criteria:</text:p>
      <text:list xml:id="list1718045609" text:style-name="L68">
        <text:list-item>
          <text:p text:style-name="P70">Every Objective and Constraint has a mathematical preview.</text:p>
        </text:list-item>
        <text:list-item>
          <text:p text:style-name="P70">TaggedSum renders symbolically.</text:p>
        </text:list-item>
        <text:list-item>
          <text:p text:style-name="P70">Symbolic output updates automatically after edits.</text:p>
        </text:list-item>
        <text:list-item>
          <text:p text:style-name="P70">Existing evaluation functionality continues working.</text:p>
        </text:list-item>
      </text:list>
      <text:p text:style-name="Text_20_body">Constraints:</text:p>
      <text:list xml:id="list2132572086" text:style-name="L69">
        <text:list-item>
          <text:p text:style-name="P71"><text:soft-page-break/>Do not generate CVXPY yet.</text:p>
        </text:list-item>
        <text:list-item>
          <text:p text:style-name="P71">Keep symbolic layer separate from code generation.</text:p>
        </text:list-item>
        <text:list-item>
          <text:p text:style-name="P71">Preserve existing functionality.</text:p>
        </text:list-item>
      </text:list>
      <text:p text:style-name="P6"/>
      <text:p text:style-name="P5">BATCH 5A</text:p>
      <text:p text:style-name="P47">Batch 5A / Prompt 1 — Create Python package skeleton for Atlas modeling core</text:p>
      <text:p text:style-name="Text_20_body">Context:<text:line-break/>Atlas Optimization Suite needs a real Python modeling core, not backend logic hidden inside FastAPI endpoints. The GUI exports Atlas IR JSON. Python validates that IR, compiles it into a structured <text:span text:style-name="Source_20_Text">AtlasDesk</text:span> object, evaluates expressions, generates diagnostics, and later compiles to CVXPY.</text:p>
      <text:p text:style-name="Text_20_body">Goal:<text:line-break/>Create a clean Python package skeleton for the backend modeling core.</text:p>
      <text:p text:style-name="Text_20_body">Detailed requirements:</text:p>
      <text:list xml:id="list3971227150" text:style-name="L134">
        <text:list-item>
          <text:p text:style-name="P136">Create package structure, e.g.</text:p>
        </text:list-item>
      </text:list>
      <text:p text:style-name="Text_20_body">backend/<text:line-break/>atlas_opt/<text:line-break/><text:span text:style-name="Strong_20_Emphasis">init</text:span>.py<text:line-break/>schema.py<text:line-break/>desk.py<text:line-break/>cards.py<text:line-break/>properties.py<text:line-break/>queries.py<text:line-break/>expressions.py<text:line-break/>functions.py<text:line-break/>objectives.py<text:line-break/>constraints.py<text:line-break/>diagnostics.py<text:line-break/>evaluator.py<text:line-break/>compiler.py<text:line-break/>optimizer.py<text:line-break/>reports.py<text:line-break/>kpis.py<text:line-break/>cvxpy_backend.py</text:p>
      <text:list xml:id="list2355719539" text:style-name="L135">
        <text:list-item>
          <text:p text:style-name="P137">Add minimal docstrings explaining each module.</text:p>
        </text:list-item>
        <text:list-item>
          <text:p text:style-name="P137">Keep FastAPI endpoints separate from this package.</text:p>
        </text:list-item>
        <text:list-item>
          <text:p text:style-name="P137">Add pyproject/requirements updates if needed.</text:p>
        </text:list-item>
        <text:list-item>
          <text:p text:style-name="P137">Add pytest setup if missing.</text:p>
        </text:list-item>
        <text:list-item>
          <text:p text:style-name="P137"><text:soft-page-break/>Add a short <text:span text:style-name="Source_20_Text">backend/README.md</text:span> describing the intended architecture.</text:p>
        </text:list-item>
      </text:list>
      <text:p text:style-name="Text_20_body">Testing:</text:p>
      <text:list xml:id="list1548427813" text:style-name="L136">
        <text:list-item>
          <text:p text:style-name="P138">Add a trivial import test for <text:span text:style-name="Source_20_Text">atlas_opt</text:span>.</text:p>
        </text:list-item>
        <text:list-item>
          <text:p text:style-name="P138">Add tests that all modules import cleanly.</text:p>
        </text:list-item>
        <text:list-item>
          <text:p text:style-name="P138">Run backend tests.</text:p>
        </text:list-item>
      </text:list>
      <text:p text:style-name="Text_20_body">Acceptance criteria:</text:p>
      <text:list xml:id="list4078563409" text:style-name="L137">
        <text:list-item>
          <text:p text:style-name="P139">Python package imports successfully.</text:p>
        </text:list-item>
        <text:list-item>
          <text:p text:style-name="P139">Test suite runs.</text:p>
        </text:list-item>
        <text:list-item>
          <text:p text:style-name="P139">README explains GUI IR → AtlasDesk → evaluator/compiler/optimizer flow.</text:p>
        </text:list-item>
        <text:list-item>
          <text:p text:style-name="P139">No CVXPY logic is required yet.</text:p>
        </text:list-item>
      </text:list>
      <text:p text:style-name="Text_20_body">Constraints:</text:p>
      <text:list xml:id="list405523034" text:style-name="L138">
        <text:list-item>
          <text:p text:style-name="P140">Do not implement large solver features yet.</text:p>
        </text:list-item>
        <text:list-item>
          <text:p text:style-name="P140">Keep package independent from frontend code.</text:p>
        </text:list-item>
        <text:list-item>
          <text:p text:style-name="P140">Do not put core modeling logic in FastAPI routes.</text:p>
        </text:list-item>
      </text:list>
      <text:p text:style-name="P7"/>
      <text:p text:style-name="P47">Batch 5A / Prompt 2 — Define Pydantic Atlas IR schema models</text:p>
      <text:p text:style-name="Text_20_body">Context:<text:line-break/>The frontend sends Atlas IR JSON. The Python backend needs typed Pydantic models matching the frontend IR before compiling into semantic objects.</text:p>
      <text:p text:style-name="Text_20_body">Current state:<text:line-break/>The Python package skeleton exists.</text:p>
      <text:p text:style-name="Text_20_body">Goal:<text:line-break/>Implement <text:span text:style-name="Source_20_Text">schema.py</text:span> with Pydantic models for Atlas IR.</text:p>
      <text:p text:style-name="Text_20_body">Detailed requirements:</text:p>
      <text:list xml:id="list1848199059" text:style-name="L139">
        <text:list-item>
          <text:p text:style-name="P141">Define Pydantic models for:</text:p>
          <text:list>
            <text:list-item>
              <text:p text:style-name="P141">AtlasIR</text:p>
            </text:list-item>
            <text:list-item>
              <text:p text:style-name="P141">CardIR</text:p>
            </text:list-item>
            <text:list-item>
              <text:p text:style-name="P141">TagIR</text:p>
            </text:list-item>
            <text:list-item>
              <text:p text:style-name="P141">PropertyIR</text:p>
            </text:list-item>
            <text:list-item>
              <text:p text:style-name="P141">ModuleIR if living-card modules exist</text:p>
            </text:list-item>
            <text:list-item>
              <text:p text:style-name="P141">DiagnosticIR if relevant</text:p>
            </text:list-item>
            <text:list-item>
              <text:p text:style-name="P141">QueryIR</text:p>
            </text:list-item>
            <text:list-item>
              <text:p text:style-name="P141">ExpressionIR</text:p>
            </text:list-item>
            <text:list-item>
              <text:p text:style-name="P141"><text:soft-page-break/>FunctionConfigIR</text:p>
            </text:list-item>
            <text:list-item>
              <text:p text:style-name="P141">ObjectiveIR</text:p>
            </text:list-item>
            <text:list-item>
              <text:p text:style-name="P141">ObjectiveTermIR</text:p>
            </text:list-item>
            <text:list-item>
              <text:p text:style-name="P141">ConstraintIR</text:p>
            </text:list-item>
            <text:list-item>
              <text:p text:style-name="P141">GroupIR</text:p>
            </text:list-item>
            <text:list-item>
              <text:p text:style-name="P141">MetadataIR</text:p>
            </text:list-item>
          </text:list>
        </text:list-item>
        <text:list-item>
          <text:p text:style-name="P141">Include <text:span text:style-name="Source_20_Text">schemaVersion</text:span>, default <text:span text:style-name="Source_20_Text">"0.1"</text:span>.</text:p>
        </text:list-item>
        <text:list-item>
          <text:p text:style-name="P141">Keep models close to frontend JSON.</text:p>
        </text:list-item>
        <text:list-item>
          <text:p text:style-name="P141">Allow optional layout fields.</text:p>
        </text:list-item>
        <text:list-item>
          <text:p text:style-name="P141">Use clear validation for required ids, card types, and basic enums.</text:p>
        </text:list-item>
        <text:list-item>
          <text:p text:style-name="P141">Do not make schema too restrictive yet; semantic checks belong later.</text:p>
        </text:list-item>
      </text:list>
      <text:p text:style-name="Text_20_body">Testing:</text:p>
      <text:list xml:id="list2664469270" text:style-name="L140">
        <text:list-item>
          <text:p text:style-name="P142">Add pytest tests for:</text:p>
          <text:list>
            <text:list-item>
              <text:p text:style-name="P142">minimal valid IR</text:p>
            </text:list-item>
            <text:list-item>
              <text:p text:style-name="P142">card with tags/properties</text:p>
            </text:list-item>
            <text:list-item>
              <text:p text:style-name="P142">query IR</text:p>
            </text:list-item>
            <text:list-item>
              <text:p text:style-name="P142">TaggedSum function IR</text:p>
            </text:list-item>
            <text:list-item>
              <text:p text:style-name="P142">objective and constraint IR</text:p>
            </text:list-item>
            <text:list-item>
              <text:p text:style-name="P142">invalid card type</text:p>
            </text:list-item>
            <text:list-item>
              <text:p text:style-name="P142">missing required id</text:p>
            </text:list-item>
          </text:list>
        </text:list-item>
        <text:list-item>
          <text:p text:style-name="P142">Run backend tests.</text:p>
        </text:list-item>
      </text:list>
      <text:p text:style-name="Text_20_body">Acceptance criteria:</text:p>
      <text:list xml:id="list955881654" text:style-name="L141">
        <text:list-item>
          <text:p text:style-name="P143">Backend can parse representative frontend IR.</text:p>
        </text:list-item>
        <text:list-item>
          <text:p text:style-name="P143">Invalid schema-level data raises readable validation errors.</text:p>
        </text:list-item>
        <text:list-item>
          <text:p text:style-name="P143">Schema models remain JSON-serializable.</text:p>
        </text:list-item>
      </text:list>
      <text:p text:style-name="Text_20_body">Constraints:</text:p>
      <text:list xml:id="list3398215458" text:style-name="L142">
        <text:list-item>
          <text:p text:style-name="P144">Do not compile to semantic objects yet.</text:p>
        </text:list-item>
        <text:list-item>
          <text:p text:style-name="P144">Do not import CVXPY here.</text:p>
        </text:list-item>
        <text:list-item>
          <text:p text:style-name="P144">Keep this layer as raw validated IR, not optimization logic.</text:p>
        </text:list-item>
      </text:list>
      <text:p text:style-name="P7"/>
      <text:p text:style-name="P47">Batch 5A / Prompt 3 — Implement AtlasDesk and registries</text:p>
      <text:p text:style-name="Text_20_body"><text:soft-page-break/>Context:<text:line-break/>After validating Atlas IR, Python should compile it into a semantic <text:span text:style-name="Source_20_Text">AtlasDesk</text:span> object. <text:span text:style-name="Source_20_Text">AtlasDesk</text:span> is the top-level object representing the workbench/model. It owns cards, queries, objectives, constraints, diagnostics, and later optimizer/report modules.</text:p>
      <text:p text:style-name="Text_20_body">Current state:<text:line-break/>Pydantic Atlas IR schema exists.</text:p>
      <text:p text:style-name="Text_20_body">Goal:<text:line-break/>Implement <text:span text:style-name="Source_20_Text">AtlasDesk.from_ir(...)</text:span> and basic registries.</text:p>
      <text:p text:style-name="Text_20_body">Detailed requirements:</text:p>
      <text:list xml:id="list3663989703" text:style-name="L143">
        <text:list-item>
          <text:p text:style-name="P145">Implement <text:span text:style-name="Source_20_Text">AtlasDesk</text:span> in <text:span text:style-name="Source_20_Text">desk.py</text:span>.</text:p>
        </text:list-item>
        <text:list-item>
          <text:p text:style-name="P145"><text:span text:style-name="Source_20_Text">AtlasDesk</text:span> should contain:</text:p>
          <text:list>
            <text:list-item>
              <text:p text:style-name="P145">cards registry</text:p>
            </text:list-item>
            <text:list-item>
              <text:p text:style-name="P145">queries registry</text:p>
            </text:list-item>
            <text:list-item>
              <text:p text:style-name="P145">objectives registry</text:p>
            </text:list-item>
            <text:list-item>
              <text:p text:style-name="P145">constraints registry</text:p>
            </text:list-item>
            <text:list-item>
              <text:p text:style-name="P145">diagnostics collection</text:p>
            </text:list-item>
            <text:list-item>
              <text:p text:style-name="P145">optional metadata</text:p>
            </text:list-item>
          </text:list>
        </text:list-item>
        <text:list-item>
          <text:p text:style-name="P145">Implement card classes in <text:span text:style-name="Source_20_Text">cards.py</text:span>:</text:p>
          <text:list>
            <text:list-item>
              <text:p text:style-name="P145">AtlasCard</text:p>
            </text:list-item>
            <text:list-item>
              <text:p text:style-name="P145">generic card types if useful: ObjectCard, DecisionCard, FunctionCard, ConstraintCard, ObjectiveCard, DataCard</text:p>
            </text:list-item>
          </text:list>
        </text:list-item>
        <text:list-item>
          <text:p text:style-name="P145">Implement lookup helpers:</text:p>
          <text:list>
            <text:list-item>
              <text:p text:style-name="P145">get_card(card_id)</text:p>
            </text:list-item>
            <text:list-item>
              <text:p text:style-name="P145">find_cards_by_type(card_type)</text:p>
            </text:list-item>
            <text:list-item>
              <text:p text:style-name="P145">get_property(card_id, property_name)</text:p>
            </text:list-item>
            <text:list-item>
              <text:p text:style-name="P145">list_properties(card_id)</text:p>
            </text:list-item>
          </text:list>
        </text:list-item>
        <text:list-item>
          <text:p text:style-name="P145">Create meaningful diagnostics instead of crashing where possible.</text:p>
        </text:list-item>
        <text:list-item>
          <text:p text:style-name="P145">Keep semantic model separate from raw IR but allow access to source ids.</text:p>
        </text:list-item>
      </text:list>
      <text:p text:style-name="Text_20_body">Testing:</text:p>
      <text:list xml:id="list1935960529" text:style-name="L144">
        <text:list-item>
          <text:p text:style-name="P146">Add tests:</text:p>
          <text:list>
            <text:list-item>
              <text:p text:style-name="P146">build AtlasDesk from minimal IR</text:p>
            </text:list-item>
            <text:list-item>
              <text:p text:style-name="P146">card lookup works</text:p>
            </text:list-item>
            <text:list-item>
              <text:p text:style-name="P146">property lookup works</text:p>
            </text:list-item>
            <text:list-item>
              <text:p text:style-name="P146"><text:soft-page-break/>missing card returns diagnostic or controlled error</text:p>
            </text:list-item>
            <text:list-item>
              <text:p text:style-name="P146">cards by type work</text:p>
            </text:list-item>
          </text:list>
        </text:list-item>
        <text:list-item>
          <text:p text:style-name="P146">Run backend tests.</text:p>
        </text:list-item>
      </text:list>
      <text:p text:style-name="Text_20_body">Acceptance criteria:</text:p>
      <text:list xml:id="list3133713828" text:style-name="L145">
        <text:list-item>
          <text:p text:style-name="P147"><text:span text:style-name="Source_20_Text">AtlasDesk.from_ir(ir)</text:span> returns a usable semantic model.</text:p>
        </text:list-item>
        <text:list-item>
          <text:p text:style-name="P147">Cards/properties can be looked up reliably.</text:p>
        </text:list-item>
        <text:list-item>
          <text:p text:style-name="P147">Diagnostics are collected for missing/invalid references.</text:p>
        </text:list-item>
        <text:list-item>
          <text:p text:style-name="P147">No CVXPY logic yet.</text:p>
        </text:list-item>
      </text:list>
      <text:p text:style-name="Text_20_body">Constraints:</text:p>
      <text:list xml:id="list1658063027" text:style-name="L146">
        <text:list-item>
          <text:p text:style-name="P148">Keep implementation small.</text:p>
        </text:list-item>
        <text:list-item>
          <text:p text:style-name="P148">Do not duplicate all Pydantic fields unnecessarily unless useful.</text:p>
        </text:list-item>
        <text:list-item>
          <text:p text:style-name="P148">Preserve source ids for frontend result mapping.</text:p>
        </text:list-item>
      </text:list>
      <text:p text:style-name="P7"/>
      <text:p text:style-name="P7"/>
      <text:p text:style-name="P47">Batch 5A / Prompt 4 — Query engine for typed tags</text:p>
      <text:p text:style-name="Text_20_body">Context:<text:line-break/>Atlas uses typed tags for query-based indexing. Expressions such as TaggedSum select all cards matching tags like <text:span text:style-name="Source_20_Text">type = product</text:span> and <text:span text:style-name="Source_20_Text">factory = A</text:span>.</text:p>
      <text:p text:style-name="Text_20_body">Current state:<text:line-break/>AtlasDesk and card registry exist.</text:p>
      <text:p text:style-name="Text_20_body">Goal:<text:line-break/>Implement query evaluation in Python.</text:p>
      <text:p text:style-name="Text_20_body">Detailed requirements:</text:p>
      <text:list xml:id="list1830193859" text:style-name="L147">
        <text:list-item>
          <text:p text:style-name="P149">Implement query logic in <text:span text:style-name="Source_20_Text">queries.py</text:span>.</text:p>
        </text:list-item>
        <text:list-item>
          <text:p text:style-name="P149">Support:</text:p>
          <text:list>
            <text:list-item>
              <text:p text:style-name="P149">includeTags with AND semantics</text:p>
            </text:list-item>
            <text:list-item>
              <text:p text:style-name="P149">excludeTags</text:p>
            </text:list-item>
            <text:list-item>
              <text:p text:style-name="P149">empty query matches all cards or returns controlled behavior; document choice</text:p>
            </text:list-item>
          </text:list>
        </text:list-item>
        <text:list-item>
          <text:p text:style-name="P149">Integrate with AtlasDesk:</text:p>
          <text:list>
            <text:list-item>
              <text:p text:style-name="P149"><text:span text:style-name="Source_20_Text">desk.evaluate_query(query_id)</text:span></text:p>
            </text:list-item>
            <text:list-item>
              <text:p text:style-name="P149"><text:span text:style-name="Source_20_Text">desk.evaluate_query_object(query)</text:span></text:p>
            </text:list-item>
          </text:list>
        </text:list-item>
        <text:list-item>
          <text:p text:style-name="P149">Return structured query result:</text:p>
          <text:list>
            <text:list-item>
              <text:p text:style-name="P149">matched card ids</text:p>
            </text:list-item>
            <text:list-item>
              <text:p text:style-name="P149"><text:soft-page-break/>matched cards</text:p>
            </text:list-item>
            <text:list-item>
              <text:p text:style-name="P149">diagnostics</text:p>
            </text:list-item>
          </text:list>
        </text:list-item>
        <text:list-item>
          <text:p text:style-name="P149">Add helper to collect available property names among matched cards.</text:p>
        </text:list-item>
        <text:list-item>
          <text:p text:style-name="P149">Add helper to detect missing required properties among query results.</text:p>
        </text:list-item>
      </text:list>
      <text:p text:style-name="Text_20_body">Testing:</text:p>
      <text:list xml:id="list1021040484" text:style-name="L148">
        <text:list-item>
          <text:p text:style-name="P150">Add tests:</text:p>
          <text:list>
            <text:list-item>
              <text:p text:style-name="P150">include one tag</text:p>
            </text:list-item>
            <text:list-item>
              <text:p text:style-name="P150">include multiple tags</text:p>
            </text:list-item>
            <text:list-item>
              <text:p text:style-name="P150">exclude tag</text:p>
            </text:list-item>
            <text:list-item>
              <text:p text:style-name="P150">no matches</text:p>
            </text:list-item>
            <text:list-item>
              <text:p text:style-name="P150">missing tags</text:p>
            </text:list-item>
            <text:list-item>
              <text:p text:style-name="P150">available properties among matches</text:p>
            </text:list-item>
            <text:list-item>
              <text:p text:style-name="P150">missing property diagnostics</text:p>
            </text:list-item>
          </text:list>
        </text:list-item>
        <text:list-item>
          <text:p text:style-name="P150">Run backend tests.</text:p>
        </text:list-item>
      </text:list>
      <text:p text:style-name="Text_20_body">Acceptance criteria:</text:p>
      <text:list xml:id="list1962862699" text:style-name="L149">
        <text:list-item>
          <text:p text:style-name="P151">Python query engine matches frontend semantics.</text:p>
        </text:list-item>
        <text:list-item>
          <text:p text:style-name="P151">Query results are deterministic.</text:p>
        </text:list-item>
        <text:list-item>
          <text:p text:style-name="P151">Missing properties can be diagnosed.</text:p>
        </text:list-item>
        <text:list-item>
          <text:p text:style-name="P151">AtlasDesk can evaluate stored queries by id.</text:p>
        </text:list-item>
      </text:list>
      <text:p text:style-name="Text_20_body">Constraints:</text:p>
      <text:list xml:id="list399242605" text:style-name="L150">
        <text:list-item>
          <text:p text:style-name="P152">Do not introduce complex Boolean expression parser yet.</text:p>
        </text:list-item>
        <text:list-item>
          <text:p text:style-name="P152">Do not involve CVXPY.</text:p>
        </text:list-item>
      </text:list>
      <text:p text:style-name="P7"/>
      <text:p text:style-name="P7"/>
      <text:p text:style-name="P47">Batch 5A / Prompt 5 — Expression AST and evaluator</text:p>
      <text:p text:style-name="Text_20_body">Context:<text:line-break/>Atlas expressions must be evaluable before solving and later compilable to CVXPY. The first supported expression subset should include literals, property references, addition, multiplication, and function references.</text:p>
      <text:p text:style-name="Text_20_body">Current state:<text:line-break/>AtlasDesk and query engine exist.</text:p>
      <text:p text:style-name="Text_20_body">Goal:<text:line-break/>Implement expression classes and a pure Python evaluator.</text:p>
      <text:p text:style-name="Text_20_body"><text:soft-page-break/>Detailed requirements:</text:p>
      <text:list xml:id="list3466227274" text:style-name="L151">
        <text:list-item>
          <text:p text:style-name="P153">Implement expression structures in <text:span text:style-name="Source_20_Text">expressions.py</text:span>.</text:p>
        </text:list-item>
        <text:list-item>
          <text:p text:style-name="P153">Support expression kinds:</text:p>
          <text:list>
            <text:list-item>
              <text:p text:style-name="P153">literal</text:p>
            </text:list-item>
            <text:list-item>
              <text:p text:style-name="P153">property_ref</text:p>
            </text:list-item>
            <text:list-item>
              <text:p text:style-name="P153">add</text:p>
            </text:list-item>
            <text:list-item>
              <text:p text:style-name="P153">multiply</text:p>
            </text:list-item>
            <text:list-item>
              <text:p text:style-name="P153">function_ref</text:p>
            </text:list-item>
          </text:list>
        </text:list-item>
        <text:list-item>
          <text:p text:style-name="P153">Implement evaluator in <text:span text:style-name="Source_20_Text">evaluator.py</text:span>.</text:p>
        </text:list-item>
        <text:list-item>
          <text:p text:style-name="P153">Evaluation should use:</text:p>
          <text:list>
            <text:list-item>
              <text:p text:style-name="P153">card properties</text:p>
            </text:list-item>
            <text:list-item>
              <text:p text:style-name="P153">literal values</text:p>
            </text:list-item>
            <text:list-item>
              <text:p text:style-name="P153">provided runtime values / solution values if available</text:p>
            </text:list-item>
          </text:list>
        </text:list-item>
        <text:list-item>
          <text:p text:style-name="P153">Return structured evaluation result:</text:p>
          <text:list>
            <text:list-item>
              <text:p text:style-name="P153">value</text:p>
            </text:list-item>
            <text:list-item>
              <text:p text:style-name="P153">diagnostics</text:p>
            </text:list-item>
            <text:list-item>
              <text:p text:style-name="P153">dependencies</text:p>
            </text:list-item>
          </text:list>
        </text:list-item>
        <text:list-item>
          <text:p text:style-name="P153">Missing values should not crash.</text:p>
        </text:list-item>
        <text:list-item>
          <text:p text:style-name="P153">Non-numeric values in numeric expressions should produce diagnostics.</text:p>
        </text:list-item>
        <text:list-item>
          <text:p text:style-name="P153">Keep evaluator independent from CVXPY.</text:p>
        </text:list-item>
      </text:list>
      <text:p text:style-name="Text_20_body">Testing:</text:p>
      <text:list xml:id="list3696789027" text:style-name="L152">
        <text:list-item>
          <text:p text:style-name="P154">Add tests:</text:p>
          <text:list>
            <text:list-item>
              <text:p text:style-name="P154">literal evaluation</text:p>
            </text:list-item>
            <text:list-item>
              <text:p text:style-name="P154">property reference evaluation</text:p>
            </text:list-item>
            <text:list-item>
              <text:p text:style-name="P154">multiply constant × property</text:p>
            </text:list-item>
            <text:list-item>
              <text:p text:style-name="P154">add terms</text:p>
            </text:list-item>
            <text:list-item>
              <text:p text:style-name="P154">missing property</text:p>
            </text:list-item>
            <text:list-item>
              <text:p text:style-name="P154">non-numeric value diagnostics</text:p>
            </text:list-item>
            <text:list-item>
              <text:p text:style-name="P154">dependency extraction</text:p>
            </text:list-item>
          </text:list>
        </text:list-item>
        <text:list-item>
          <text:p text:style-name="P154">Run backend tests.</text:p>
        </text:list-item>
      </text:list>
      <text:p text:style-name="Text_20_body">Acceptance criteria:</text:p>
      <text:list xml:id="list1139378362" text:style-name="L153">
        <text:list-item>
          <text:p text:style-name="P155">Simple expressions evaluate correctly.</text:p>
        </text:list-item>
        <text:list-item>
          <text:p text:style-name="P155"><text:soft-page-break/>Missing/invalid values produce diagnostics.</text:p>
        </text:list-item>
        <text:list-item>
          <text:p text:style-name="P155">Dependencies are returned for UI highlighting.</text:p>
        </text:list-item>
        <text:list-item>
          <text:p text:style-name="P155">No CVXPY dependency.</text:p>
        </text:list-item>
      </text:list>
      <text:p text:style-name="Text_20_body">Constraints:</text:p>
      <text:list xml:id="list1367817266" text:style-name="L154">
        <text:list-item>
          <text:p text:style-name="P156">Do not implement arbitrary string formula parsing yet.</text:p>
        </text:list-item>
        <text:list-item>
          <text:p text:style-name="P156">Use structured JSON expression objects only.</text:p>
        </text:list-item>
      </text:list>
      <text:p text:style-name="P7"/>
      <text:p text:style-name="P7"/>
      <text:p text:style-name="P47">Batch 5A / Prompt 6 — TaggedSum semantic function</text:p>
      <text:p text:style-name="Text_20_body">Context:<text:line-break/>TaggedSum is the core Atlas modeling function: select cards by query, evaluate an expression on each matching card, and sum the result. This supports semantic indexing and automatic model updates.</text:p>
      <text:p text:style-name="Text_20_body">Current state:<text:line-break/>Python has AtlasDesk, query engine, expression AST, and evaluator.</text:p>
      <text:p text:style-name="Text_20_body">Goal:<text:line-break/>Implement TaggedSum in the Python modeling core.</text:p>
      <text:p text:style-name="Text_20_body">Detailed requirements:</text:p>
      <text:list xml:id="list2378137521" text:style-name="L155">
        <text:list-item>
          <text:p text:style-name="P157">Implement function abstractions in <text:span text:style-name="Source_20_Text">functions.py</text:span>.</text:p>
        </text:list-item>
        <text:list-item>
          <text:p text:style-name="P157">Add <text:span text:style-name="Source_20_Text">TaggedSumFunction</text:span>.</text:p>
        </text:list-item>
        <text:list-item>
          <text:p text:style-name="P157">A TaggedSum should contain:</text:p>
          <text:list>
            <text:list-item>
              <text:p text:style-name="P157">source function card id</text:p>
            </text:list-item>
            <text:list-item>
              <text:p text:style-name="P157">query id or inline query</text:p>
            </text:list-item>
            <text:list-item>
              <text:p text:style-name="P157">expression</text:p>
            </text:list-item>
            <text:list-item>
              <text:p text:style-name="P157">name</text:p>
            </text:list-item>
          </text:list>
        </text:list-item>
        <text:list-item>
          <text:p text:style-name="P157">Implement:</text:p>
          <text:list>
            <text:list-item>
              <text:p text:style-name="P157">dependency extraction</text:p>
            </text:list-item>
            <text:list-item>
              <text:p text:style-name="P157">evaluation</text:p>
            </text:list-item>
            <text:list-item>
              <text:p text:style-name="P157">symbolic preview string</text:p>
            </text:list-item>
            <text:list-item>
              <text:p text:style-name="P157">diagnostics for missing properties</text:p>
            </text:list-item>
          </text:list>
        </text:list-item>
        <text:list-item>
          <text:p text:style-name="P157">Integrate with AtlasDesk:</text:p>
          <text:list>
            <text:list-item>
              <text:p text:style-name="P157">load function cards into function registry</text:p>
            </text:list-item>
            <text:list-item>
              <text:p text:style-name="P157">evaluate function by id</text:p>
            </text:list-item>
          </text:list>
        </text:list-item>
        <text:list-item>
          <text:p text:style-name="P157">Keep design extensible for later atoms/functions.</text:p>
        </text:list-item>
      </text:list>
      <text:p text:style-name="Text_20_body"><text:soft-page-break/>Testing:</text:p>
      <text:list xml:id="list3848349659" text:style-name="L156">
        <text:list-item>
          <text:p text:style-name="P158">Add tests:</text:p>
          <text:list>
            <text:list-item>
              <text:p text:style-name="P158">TaggedSum over three product cards</text:p>
            </text:list-item>
            <text:list-item>
              <text:p text:style-name="P158">query selects subset</text:p>
            </text:list-item>
            <text:list-item>
              <text:p text:style-name="P158">expression <text:span text:style-name="Source_20_Text">unit_cost * production_quantity</text:span></text:p>
            </text:list-item>
            <text:list-item>
              <text:p text:style-name="P158">missing property diagnostic</text:p>
            </text:list-item>
            <text:list-item>
              <text:p text:style-name="P158">symbolic preview</text:p>
            </text:list-item>
            <text:list-item>
              <text:p text:style-name="P158">dependency list</text:p>
            </text:list-item>
          </text:list>
        </text:list-item>
        <text:list-item>
          <text:p text:style-name="P158">Run backend tests.</text:p>
        </text:list-item>
      </text:list>
      <text:p text:style-name="Text_20_body">Acceptance criteria:</text:p>
      <text:list xml:id="list245782599" text:style-name="L157">
        <text:list-item>
          <text:p text:style-name="P159"><text:span text:style-name="Source_20_Text">desk.evaluate_function(function_id)</text:span> works for TaggedSum.</text:p>
        </text:list-item>
        <text:list-item>
          <text:p text:style-name="P159">TaggedSum returns value, dependencies, and diagnostics.</text:p>
        </text:list-item>
        <text:list-item>
          <text:p text:style-name="P159">Symbolic preview is readable.</text:p>
        </text:list-item>
        <text:list-item>
          <text:p text:style-name="P159">No CVXPY logic yet.</text:p>
        </text:list-item>
      </text:list>
      <text:p text:style-name="Text_20_body">Constraints:</text:p>
      <text:list xml:id="list4008188953" text:style-name="L158">
        <text:list-item>
          <text:p text:style-name="P160">Do not implement many functions now.</text:p>
        </text:list-item>
        <text:list-item>
          <text:p text:style-name="P160">Do not hard-code product/factory semantics.</text:p>
        </text:list-item>
      </text:list>
      <text:p text:style-name="P7"/>
      <text:p text:style-name="P7"/>
      <text:p text:style-name="P47">Batch 5A / Prompt 7 — Objective, constraint, KPI, and report objects</text:p>
      <text:p text:style-name="Text_20_body">Context:<text:line-break/>AtlasDesk should organize objective functions, constraints, KPIs, and reports as structured semantic objects. KPIs and reports may be simple placeholders now, but the architecture should exist.</text:p>
      <text:p text:style-name="Text_20_body">Current state:<text:line-break/>TaggedSum functions can be evaluated semantically.</text:p>
      <text:p text:style-name="Text_20_body">Goal:<text:line-break/>Implement semantic objects for objectives, constraints, KPIs, and reports.</text:p>
      <text:p text:style-name="Text_20_body">Detailed requirements:</text:p>
      <text:list xml:id="list2379055848" text:style-name="L159">
        <text:list-item>
          <text:p text:style-name="P161">Implement <text:span text:style-name="Source_20_Text">objectives.py</text:span>:</text:p>
          <text:list>
            <text:list-item>
              <text:p text:style-name="P161">Objective</text:p>
            </text:list-item>
            <text:list-item>
              <text:p text:style-name="P161">ObjectiveTerm</text:p>
            </text:list-item>
            <text:list-item>
              <text:p text:style-name="P161">direction: minimize/maximize</text:p>
            </text:list-item>
            <text:list-item>
              <text:p text:style-name="P161">term references to functions/expressions</text:p>
            </text:list-item>
            <text:list-item>
              <text:p text:style-name="P161"><text:soft-page-break/>evaluation</text:p>
            </text:list-item>
            <text:list-item>
              <text:p text:style-name="P161">symbolic preview</text:p>
            </text:list-item>
          </text:list>
        </text:list-item>
        <text:list-item>
          <text:p text:style-name="P161">Implement <text:span text:style-name="Source_20_Text">constraints.py</text:span>:</text:p>
          <text:list>
            <text:list-item>
              <text:p text:style-name="P161">Constraint</text:p>
            </text:list-item>
            <text:list-item>
              <text:p text:style-name="P161">left expression/function ref</text:p>
            </text:list-item>
            <text:list-item>
              <text:p text:style-name="P161">relation &lt;=, &gt;=, ==</text:p>
            </text:list-item>
            <text:list-item>
              <text:p text:style-name="P161">right expression/function ref/constant</text:p>
            </text:list-item>
            <text:list-item>
              <text:p text:style-name="P161">evaluation of left/right/residual</text:p>
            </text:list-item>
            <text:list-item>
              <text:p text:style-name="P161">symbolic preview</text:p>
            </text:list-item>
          </text:list>
        </text:list-item>
        <text:list-item>
          <text:p text:style-name="P161">Implement minimal <text:span text:style-name="Source_20_Text">kpis.py</text:span>:</text:p>
          <text:list>
            <text:list-item>
              <text:p text:style-name="P161">KPI object with name and expression/function ref</text:p>
            </text:list-item>
            <text:list-item>
              <text:p text:style-name="P161">evaluation</text:p>
            </text:list-item>
          </text:list>
        </text:list-item>
        <text:list-item>
          <text:p text:style-name="P161">Implement minimal <text:span text:style-name="Source_20_Text">reports.py</text:span>:</text:p>
          <text:list>
            <text:list-item>
              <text:p text:style-name="P161">Report class that can collect objective, constraint, KPI, diagnostics summaries</text:p>
            </text:list-item>
          </text:list>
        </text:list-item>
        <text:list-item>
          <text:p text:style-name="P161">Integrate these with AtlasDesk registries.</text:p>
        </text:list-item>
        <text:list-item>
          <text:p text:style-name="P161">Keep diagnostics structured.</text:p>
        </text:list-item>
      </text:list>
      <text:p text:style-name="Text_20_body">Testing:</text:p>
      <text:list xml:id="list2131410687" text:style-name="L160">
        <text:list-item>
          <text:p text:style-name="P162">Add tests:</text:p>
          <text:list>
            <text:list-item>
              <text:p text:style-name="P162">objective with one TaggedSum term</text:p>
            </text:list-item>
            <text:list-item>
              <text:p text:style-name="P162">objective with two terms</text:p>
            </text:list-item>
            <text:list-item>
              <text:p text:style-name="P162">constraint left/right evaluation</text:p>
            </text:list-item>
            <text:list-item>
              <text:p text:style-name="P162">constraint residual/activity</text:p>
            </text:list-item>
            <text:list-item>
              <text:p text:style-name="P162">KPI evaluation</text:p>
            </text:list-item>
            <text:list-item>
              <text:p text:style-name="P162">report summary contains expected sections</text:p>
            </text:list-item>
          </text:list>
        </text:list-item>
        <text:list-item>
          <text:p text:style-name="P162">Run backend tests.</text:p>
        </text:list-item>
      </text:list>
      <text:p text:style-name="Text_20_body">Acceptance criteria:</text:p>
      <text:list xml:id="list2018393330" text:style-name="L161">
        <text:list-item>
          <text:p text:style-name="P163">AtlasDesk can evaluate objectives and constraints.</text:p>
        </text:list-item>
        <text:list-item>
          <text:p text:style-name="P163">Objective/constraint symbolic previews work.</text:p>
        </text:list-item>
        <text:list-item>
          <text:p text:style-name="P163">Basic KPI/report architecture exists.</text:p>
        </text:list-item>
        <text:list-item>
          <text:p text:style-name="P163">No CVXPY compilation yet.</text:p>
        </text:list-item>
      </text:list>
      <text:p text:style-name="Text_20_body">Constraints:</text:p>
      <text:list xml:id="list19117924" text:style-name="L162">
        <text:list-item>
          <text:p text:style-name="P164">Keep KPI/report simple.</text:p>
        </text:list-item>
        <text:list-item>
          <text:p text:style-name="P164"><text:soft-page-break/>Do not implement advanced reporting visuals.</text:p>
        </text:list-item>
        <text:list-item>
          <text:p text:style-name="P164">Preserve backend independence from frontend UI.</text:p>
        </text:list-item>
      </text:list>
      <text:p text:style-name="P7"/>
      <text:p text:style-name="P7"/>
      <text:p text:style-name="P47">Batch 5A / Prompt 8 — Optimizer orchestration placeholder and FastAPI refactor</text:p>
      <text:p text:style-name="Text_20_body">Context:<text:line-break/>FastAPI endpoints should be thin. The Python modeling core should own validation, desk construction, evaluation, diagnostics, and later optimization. Before adding CVXPY, refactor backend endpoints to use <text:span text:style-name="Source_20_Text">AtlasDesk</text:span>.</text:p>
      <text:p text:style-name="Text_20_body">Current state:<text:line-break/>AtlasDesk can evaluate queries, functions, objectives, constraints, KPIs, and reports.</text:p>
      <text:p text:style-name="Text_20_body">Goal:<text:line-break/>Add an optimizer orchestration object and refactor FastAPI endpoints to use the modeling core.</text:p>
      <text:p text:style-name="Text_20_body">Detailed requirements:</text:p>
      <text:list xml:id="list2701247801" text:style-name="L163">
        <text:list-item>
          <text:p text:style-name="P165">Implement <text:span text:style-name="Source_20_Text">optimizer.py</text:span> with <text:span text:style-name="Source_20_Text">AtlasOptimizer</text:span>.</text:p>
        </text:list-item>
        <text:list-item>
          <text:p text:style-name="P165">For now, <text:span text:style-name="Source_20_Text">AtlasOptimizer</text:span> should expose:</text:p>
          <text:list>
            <text:list-item>
              <text:p text:style-name="P165">validate()</text:p>
            </text:list-item>
            <text:list-item>
              <text:p text:style-name="P165">evaluate()</text:p>
            </text:list-item>
            <text:list-item>
              <text:p text:style-name="P165">generate_code() placeholder</text:p>
            </text:list-item>
            <text:list-item>
              <text:p text:style-name="P165">solve() placeholder</text:p>
            </text:list-item>
          </text:list>
        </text:list-item>
        <text:list-item>
          <text:p text:style-name="P165"><text:span text:style-name="Source_20_Text">AtlasOptimizer</text:span> should hold or receive an <text:span text:style-name="Source_20_Text">AtlasDesk</text:span>.</text:p>
        </text:list-item>
        <text:list-item>
          <text:p text:style-name="P165">Refactor FastAPI endpoints:</text:p>
          <text:list>
            <text:list-item>
              <text:p text:style-name="P165"><text:span text:style-name="Source_20_Text">/validate</text:span> builds AtlasDesk and returns diagnostics</text:p>
            </text:list-item>
            <text:list-item>
              <text:p text:style-name="P165"><text:span text:style-name="Source_20_Text">/evaluate</text:span> builds AtlasDesk and returns objective/constraint/function/KPI evaluation summaries</text:p>
            </text:list-item>
            <text:list-item>
              <text:p text:style-name="P165"><text:span text:style-name="Source_20_Text">/generate_code</text:span> returns clear not-implemented diagnostic for now</text:p>
            </text:list-item>
            <text:list-item>
              <text:p text:style-name="P165"><text:span text:style-name="Source_20_Text">/solve</text:span> returns clear not-implemented diagnostic for now</text:p>
            </text:list-item>
          </text:list>
        </text:list-item>
        <text:list-item>
          <text:p text:style-name="P165">Ensure endpoints do not contain core model logic.</text:p>
        </text:list-item>
        <text:list-item>
          <text:p text:style-name="P165">Add structured response models if useful.</text:p>
        </text:list-item>
      </text:list>
      <text:p text:style-name="Text_20_body">Testing:</text:p>
      <text:list xml:id="list337416821" text:style-name="L164">
        <text:list-item>
          <text:p text:style-name="P166">Add pytest tests for FastAPI endpoints using minimal IR.</text:p>
        </text:list-item>
        <text:list-item>
          <text:p text:style-name="P166">Test <text:span text:style-name="Source_20_Text">/evaluate</text:span> returns actual semantic evaluation.</text:p>
        </text:list-item>
        <text:list-item>
          <text:p text:style-name="P166">Test <text:span text:style-name="Source_20_Text">/solve</text:span> returns not-implemented diagnostic without crashing.</text:p>
        </text:list-item>
        <text:list-item>
          <text:p text:style-name="P166"><text:soft-page-break/>Run backend tests.</text:p>
        </text:list-item>
      </text:list>
      <text:p text:style-name="Text_20_body">Acceptance criteria:</text:p>
      <text:list xml:id="list2526516404" text:style-name="L165">
        <text:list-item>
          <text:p text:style-name="P167">FastAPI routes are thin wrappers.</text:p>
        </text:list-item>
        <text:list-item>
          <text:p text:style-name="P167">Backend evaluation uses AtlasDesk and AtlasOptimizer.</text:p>
        </text:list-item>
        <text:list-item>
          <text:p text:style-name="P167">API responses are structured and readable.</text:p>
        </text:list-item>
        <text:list-item>
          <text:p text:style-name="P167">The app remains ready for CVXPY compiler implementation.</text:p>
        </text:list-item>
      </text:list>
      <text:p text:style-name="Text_20_body">Constraints:</text:p>
      <text:list xml:id="list129334633" text:style-name="L166">
        <text:list-item>
          <text:p text:style-name="P168">Do not add CVXPY in this prompt.</text:p>
        </text:list-item>
        <text:list-item>
          <text:p text:style-name="P168">Do not duplicate evaluation logic in routes.</text:p>
        </text:list-item>
        <text:list-item>
          <text:p text:style-name="P168">Keep errors user-readable.</text:p>
        </text:list-item>
      </text:list>
      <text:p text:style-name="P7"/>
      <text:p text:style-name="P7"/>
      <text:p text:style-name="P7"/>
      <text:p text:style-name="P5">BATCH 5</text:p>
      <text:p text:style-name="P47">Batch 5 / Prompt 1 — Atlas IR export and JSON schema</text:p>
      <text:p text:style-name="Text_20_body">Context:<text:line-break/>The frontend should not directly manipulate CVXPY objects. The workbench edits a persistent JSON model, and the backend receives an Atlas Intermediate Representation containing cards, tags, properties, queries, functions, objectives, constraints, and layout metadata.</text:p>
      <text:p text:style-name="Text_20_body">Current state:<text:line-break/>Frontend supports cards, tags, properties, templates, queries, TaggedSum, objectives, constraints, evaluation, and symbolic previews.</text:p>
      <text:p text:style-name="Text_20_body">Goal:<text:line-break/>Define and implement an explicit Atlas IR export format.</text:p>
      <text:p text:style-name="Text_20_body">Detailed requirements:</text:p>
      <text:list xml:id="list3091206539" text:style-name="L70">
        <text:list-item>
          <text:p text:style-name="P72">Create a clear TypeScript type/schema for Atlas IR.</text:p>
        </text:list-item>
        <text:list-item>
          <text:p text:style-name="P72">The IR should include:</text:p>
          <text:list>
            <text:list-item>
              <text:p text:style-name="P72">cards</text:p>
            </text:list-item>
            <text:list-item>
              <text:p text:style-name="P72">card positions/layout</text:p>
            </text:list-item>
            <text:list-item>
              <text:p text:style-name="P72">tags</text:p>
            </text:list-item>
            <text:list-item>
              <text:p text:style-name="P72">properties</text:p>
            </text:list-item>
            <text:list-item>
              <text:p text:style-name="P72">queries</text:p>
            </text:list-item>
            <text:list-item>
              <text:p text:style-name="P72"><text:soft-page-break/>function configurations</text:p>
            </text:list-item>
            <text:list-item>
              <text:p text:style-name="P72">objectives</text:p>
            </text:list-item>
            <text:list-item>
              <text:p text:style-name="P72">constraints</text:p>
            </text:list-item>
            <text:list-item>
              <text:p text:style-name="P72">groups</text:p>
            </text:list-item>
            <text:list-item>
              <text:p text:style-name="P72">metadata/version</text:p>
            </text:list-item>
          </text:list>
        </text:list-item>
        <text:list-item>
          <text:p text:style-name="P72">Add an Export IR button or extend existing Export button.</text:p>
        </text:list-item>
        <text:list-item>
          <text:p text:style-name="P72">Export should produce readable JSON.</text:p>
        </text:list-item>
        <text:list-item>
          <text:p text:style-name="P72">Add import/load support for the same IR if not already present.</text:p>
        </text:list-item>
        <text:list-item>
          <text:p text:style-name="P72">Add schema versioning, e.g. <text:span text:style-name="Source_20_Text">schemaVersion: "0.1"</text:span>.</text:p>
        </text:list-item>
        <text:list-item>
          <text:p text:style-name="P72">Add validation helpers for required fields.</text:p>
        </text:list-item>
        <text:list-item>
          <text:p text:style-name="P72">Store no transient UI state such as hover/highlight unless explicitly useful.</text:p>
        </text:list-item>
      </text:list>
      <text:p text:style-name="Text_20_body">Testing:</text:p>
      <text:list xml:id="list4194748533" text:style-name="L71">
        <text:list-item>
          <text:p text:style-name="P73">Add tests for IR serialization/deserialization.</text:p>
        </text:list-item>
        <text:list-item>
          <text:p text:style-name="P73">Add tests that export/import roundtrips a small model.</text:p>
        </text:list-item>
        <text:list-item>
          <text:p text:style-name="P73">Add tests for schema version presence.</text:p>
        </text:list-item>
        <text:list-item>
          <text:p text:style-name="P73">Run lint/typecheck/build.</text:p>
        </text:list-item>
      </text:list>
      <text:p text:style-name="Text_20_body">Acceptance criteria:</text:p>
      <text:list xml:id="list356437976" text:style-name="L72">
        <text:list-item>
          <text:p text:style-name="P74">User can export the current model as Atlas IR JSON.</text:p>
        </text:list-item>
        <text:list-item>
          <text:p text:style-name="P74">User can import/load the same IR and recover the workbench.</text:p>
        </text:list-item>
        <text:list-item>
          <text:p text:style-name="P74">Roundtrip preserves cards, tags, properties, queries, objectives, constraints, and layout.</text:p>
        </text:list-item>
        <text:list-item>
          <text:p text:style-name="P74">Existing local persistence still works.</text:p>
        </text:list-item>
      </text:list>
      <text:p text:style-name="Text_20_body">Constraints:</text:p>
      <text:list xml:id="list1421158783" text:style-name="L73">
        <text:list-item>
          <text:p text:style-name="P75">Keep IR backend-independent.</text:p>
        </text:list-item>
        <text:list-item>
          <text:p text:style-name="P75">Do not include CVXPY-specific objects in frontend IR.</text:p>
        </text:list-item>
        <text:list-item>
          <text:p text:style-name="P75">Preserve existing functionality.</text:p>
        </text:list-item>
      </text:list>
      <text:p text:style-name="P7"/>
      <text:p text:style-name="P6"/>
      <text:p text:style-name="P6"/>
      <text:p text:style-name="P46">Batch 5 / Prompt 2 — Python FastAPI backend skeleton with matching Pydantic models</text:p>
      <text:p text:style-name="Text_20_body">Context:<text:line-break/>Atlas uses a React/TypeScript frontend and a Python/FastAPI backend. The backend receives Atlas IR, validates it, evaluates or compiles it, and returns structured results. This task creates the backend skeleton.</text:p>
      <text:p text:style-name="Text_20_body"><text:soft-page-break/>Current state:<text:line-break/>Frontend can export Atlas IR JSON.</text:p>
      <text:p text:style-name="Text_20_body">Goal:<text:line-break/>Create a Python FastAPI backend with Pydantic models matching Atlas IR.</text:p>
      <text:p text:style-name="Text_20_body">Detailed requirements:</text:p>
      <text:list xml:id="list3734764509" text:style-name="L74">
        <text:list-item>
          <text:p text:style-name="P76">Add a backend folder if not present.</text:p>
        </text:list-item>
        <text:list-item>
          <text:p text:style-name="P76">Use FastAPI and Pydantic.</text:p>
        </text:list-item>
        <text:list-item>
          <text:p text:style-name="P76">Define Pydantic models corresponding to the Atlas IR schema:</text:p>
          <text:list>
            <text:list-item>
              <text:p text:style-name="P76">cards</text:p>
            </text:list-item>
            <text:list-item>
              <text:p text:style-name="P76">tags</text:p>
            </text:list-item>
            <text:list-item>
              <text:p text:style-name="P76">properties</text:p>
            </text:list-item>
            <text:list-item>
              <text:p text:style-name="P76">queries</text:p>
            </text:list-item>
            <text:list-item>
              <text:p text:style-name="P76">functions</text:p>
            </text:list-item>
            <text:list-item>
              <text:p text:style-name="P76">objectives</text:p>
            </text:list-item>
            <text:list-item>
              <text:p text:style-name="P76">constraints</text:p>
            </text:list-item>
            <text:list-item>
              <text:p text:style-name="P76">groups</text:p>
            </text:list-item>
            <text:list-item>
              <text:p text:style-name="P76">metadata/version</text:p>
            </text:list-item>
          </text:list>
        </text:list-item>
        <text:list-item>
          <text:p text:style-name="P76">Implement endpoints:</text:p>
          <text:list>
            <text:list-item>
              <text:p text:style-name="P76"><text:span text:style-name="Source_20_Text">GET /health</text:span></text:p>
            </text:list-item>
            <text:list-item>
              <text:p text:style-name="P76"><text:span text:style-name="Source_20_Text">POST /validate</text:span></text:p>
            </text:list-item>
            <text:list-item>
              <text:p text:style-name="P76"><text:span text:style-name="Source_20_Text">POST /evaluate</text:span></text:p>
            </text:list-item>
            <text:list-item>
              <text:p text:style-name="P76"><text:span text:style-name="Source_20_Text">POST /generate_code</text:span></text:p>
            </text:list-item>
            <text:list-item>
              <text:p text:style-name="P76"><text:span text:style-name="Source_20_Text">POST /solve</text:span></text:p>
            </text:list-item>
          </text:list>
        </text:list-item>
        <text:list-item>
          <text:p text:style-name="P76">For now:</text:p>
          <text:list>
            <text:list-item>
              <text:p text:style-name="P76"><text:span text:style-name="Source_20_Text">/health</text:span> returns ok.</text:p>
            </text:list-item>
            <text:list-item>
              <text:p text:style-name="P76"><text:span text:style-name="Source_20_Text">/validate</text:span> validates schema and returns diagnostics.</text:p>
            </text:list-item>
            <text:list-item>
              <text:p text:style-name="P76"><text:span text:style-name="Source_20_Text">/evaluate</text:span>, <text:span text:style-name="Source_20_Text">/generate_code</text:span>, <text:span text:style-name="Source_20_Text">/solve</text:span> may return structured “not implemented yet” diagnostics, but must not crash.</text:p>
            </text:list-item>
          </text:list>
        </text:list-item>
        <text:list-item>
          <text:p text:style-name="P76">Add CORS configuration for local frontend development.</text:p>
        </text:list-item>
        <text:list-item>
          <text:p text:style-name="P76">Add backend README instructions.</text:p>
        </text:list-item>
        <text:list-item>
          <text:p text:style-name="P76">Add requirements or pyproject entries.</text:p>
        </text:list-item>
      </text:list>
      <text:p text:style-name="Text_20_body">Testing:</text:p>
      <text:list xml:id="list672979480" text:style-name="L75">
        <text:list-item>
          <text:p text:style-name="P77">Add pytest tests for <text:span text:style-name="Source_20_Text">/health</text:span>.</text:p>
        </text:list-item>
        <text:list-item>
          <text:p text:style-name="P77"><text:soft-page-break/>Add pytest tests for <text:span text:style-name="Source_20_Text">/validate</text:span> using a minimal valid IR.</text:p>
        </text:list-item>
        <text:list-item>
          <text:p text:style-name="P77">Add pytest tests for invalid IR.</text:p>
        </text:list-item>
        <text:list-item>
          <text:p text:style-name="P77">Ensure tests can run locally.</text:p>
        </text:list-item>
        <text:list-item>
          <text:p text:style-name="P77">Run backend tests.</text:p>
        </text:list-item>
      </text:list>
      <text:p text:style-name="Text_20_body">Acceptance criteria:</text:p>
      <text:list xml:id="list2657449366" text:style-name="L76">
        <text:list-item>
          <text:p text:style-name="P78">FastAPI backend starts locally.</text:p>
        </text:list-item>
        <text:list-item>
          <text:p text:style-name="P78"><text:span text:style-name="Source_20_Text">/health</text:span> works.</text:p>
        </text:list-item>
        <text:list-item>
          <text:p text:style-name="P78"><text:span text:style-name="Source_20_Text">/validate</text:span> accepts valid Atlas IR.</text:p>
        </text:list-item>
        <text:list-item>
          <text:p text:style-name="P78">Invalid IR returns readable diagnostics.</text:p>
        </text:list-item>
        <text:list-item>
          <text:p text:style-name="P78">Frontend architecture remains unchanged.</text:p>
        </text:list-item>
      </text:list>
      <text:p text:style-name="Text_20_body">Constraints:</text:p>
      <text:list xml:id="list1207960973" text:style-name="L77">
        <text:list-item>
          <text:p text:style-name="P79">Do not implement CVXPY solving yet.</text:p>
        </text:list-item>
        <text:list-item>
          <text:p text:style-name="P79">Keep backend independent from frontend UI details.</text:p>
        </text:list-item>
        <text:list-item>
          <text:p text:style-name="P79">Preserve existing frontend functionality.</text:p>
        </text:list-item>
      </text:list>
      <text:p text:style-name="P6"/>
      <text:p text:style-name="P6"/>
      <text:p text:style-name="P46">Batch 5 / Prompt 3 — Frontend-backend connection and validation workflow</text:p>
      <text:p text:style-name="Text_20_body">Context:<text:line-break/>The frontend should send Atlas IR to the backend for validation, evaluation, code generation, and solving. This task wires the frontend to the backend validation endpoint first.</text:p>
      <text:p text:style-name="Text_20_body">Current state:<text:line-break/>Frontend exports Atlas IR. Backend exposes <text:span text:style-name="Source_20_Text">/health</text:span> and <text:span text:style-name="Source_20_Text">/validate</text:span>.</text:p>
      <text:p text:style-name="Text_20_body">Goal:<text:line-break/>Connect frontend to backend validation.</text:p>
      <text:p text:style-name="Text_20_body">Detailed requirements:</text:p>
      <text:list xml:id="list860703571" text:style-name="L78">
        <text:list-item>
          <text:p text:style-name="P80">Add frontend configuration for backend base URL.</text:p>
        </text:list-item>
        <text:list-item>
          <text:p text:style-name="P80">Implement API client helpers:</text:p>
          <text:list>
            <text:list-item>
              <text:p text:style-name="P80">health check</text:p>
            </text:list-item>
            <text:list-item>
              <text:p text:style-name="P80">validate model</text:p>
            </text:list-item>
            <text:list-item>
              <text:p text:style-name="P80">evaluate model</text:p>
            </text:list-item>
            <text:list-item>
              <text:p text:style-name="P80">generate code</text:p>
            </text:list-item>
            <text:list-item>
              <text:p text:style-name="P80">solve model</text:p>
            </text:list-item>
          </text:list>
        </text:list-item>
        <text:list-item>
          <text:p text:style-name="P80">Wire toolbar Validate/Inspect or a new Validate action to <text:span text:style-name="Source_20_Text">POST /validate</text:span>.</text:p>
        </text:list-item>
        <text:list-item>
          <text:p text:style-name="P80"><text:soft-page-break/>Display backend validation results in the inspector or solution panel.</text:p>
        </text:list-item>
        <text:list-item>
          <text:p text:style-name="P80">Show connection errors clearly.</text:p>
        </text:list-item>
        <text:list-item>
          <text:p text:style-name="P80">Do not block local frontend usage if backend is unavailable.</text:p>
        </text:list-item>
        <text:list-item>
          <text:p text:style-name="P80">Add small status indicator for backend connected/unavailable.</text:p>
        </text:list-item>
        <text:list-item>
          <text:p text:style-name="P80">Keep API responses typed.</text:p>
        </text:list-item>
      </text:list>
      <text:p text:style-name="Text_20_body">Testing:</text:p>
      <text:list xml:id="list482284117" text:style-name="L79">
        <text:list-item>
          <text:p text:style-name="P81">Add tests for API client helpers using mocks.</text:p>
        </text:list-item>
        <text:list-item>
          <text:p text:style-name="P81">Add UI test for displaying validation diagnostics if feasible.</text:p>
        </text:list-item>
        <text:list-item>
          <text:p text:style-name="P81">Run frontend lint/typecheck/build.</text:p>
        </text:list-item>
        <text:list-item>
          <text:p text:style-name="P81">Run backend tests.</text:p>
        </text:list-item>
      </text:list>
      <text:p text:style-name="Text_20_body">Acceptance criteria:</text:p>
      <text:list xml:id="list2285212685" text:style-name="L80">
        <text:list-item>
          <text:p text:style-name="P82">User can click Validate or Inspect and send current IR to backend.</text:p>
        </text:list-item>
        <text:list-item>
          <text:p text:style-name="P82">Backend diagnostics appear in the UI.</text:p>
        </text:list-item>
        <text:list-item>
          <text:p text:style-name="P82">If backend is down, UI shows a friendly error.</text:p>
        </text:list-item>
        <text:list-item>
          <text:p text:style-name="P82">Existing local-only workbench remains usable.</text:p>
        </text:list-item>
      </text:list>
      <text:p text:style-name="Text_20_body">Constraints:</text:p>
      <text:list xml:id="list2611427876" text:style-name="L81">
        <text:list-item>
          <text:p text:style-name="P83">Do not implement solving yet.</text:p>
        </text:list-item>
        <text:list-item>
          <text:p text:style-name="P83">Do not hard-code localhost throughout the app; centralize backend URL.</text:p>
        </text:list-item>
        <text:list-item>
          <text:p text:style-name="P83">Preserve existing functionality.</text:p>
        </text:list-item>
      </text:list>
      <text:p text:style-name="P6"/>
      <text:p text:style-name="P6"/>
      <text:p text:style-name="P46">Batch 5 / Prompt 4 — Backend evaluator matching frontend evaluator</text:p>
      <text:p text:style-name="Text_20_body">Context:<text:line-break/>Atlas has a frontend evaluator for immediate feedback. The backend also needs an evaluator because solving/code generation will happen in Python and must understand the same IR semantics.</text:p>
      <text:p text:style-name="Text_20_body">Current state:<text:line-break/>Backend validates Atlas IR. Frontend can evaluate expressions locally.</text:p>
      <text:p text:style-name="Text_20_body">Goal:<text:line-break/>Implement backend evaluation for constants, simple expressions, TaggedSum, objectives, and constraints.</text:p>
      <text:p text:style-name="Text_20_body">Detailed requirements:</text:p>
      <text:list xml:id="list2547443263" text:style-name="L82">
        <text:list-item>
          <text:p text:style-name="P84">Implement backend evaluation functions for:</text:p>
          <text:list>
            <text:list-item>
              <text:p text:style-name="P84">constants</text:p>
            </text:list-item>
            <text:list-item>
              <text:p text:style-name="P84"><text:soft-page-break/>property references</text:p>
            </text:list-item>
            <text:list-item>
              <text:p text:style-name="P84">multiplication</text:p>
            </text:list-item>
            <text:list-item>
              <text:p text:style-name="P84">addition if present in IR</text:p>
            </text:list-item>
            <text:list-item>
              <text:p text:style-name="P84">TaggedSum</text:p>
            </text:list-item>
            <text:list-item>
              <text:p text:style-name="P84">objective terms</text:p>
            </text:list-item>
            <text:list-item>
              <text:p text:style-name="P84">objectives</text:p>
            </text:list-item>
            <text:list-item>
              <text:p text:style-name="P84">constraint left/right values</text:p>
            </text:list-item>
          </text:list>
        </text:list-item>
        <text:list-item>
          <text:p text:style-name="P84">Match the semantics of the frontend evaluator.</text:p>
        </text:list-item>
        <text:list-item>
          <text:p text:style-name="P84">Return structured results:</text:p>
          <text:list>
            <text:list-item>
              <text:p text:style-name="P84">values</text:p>
            </text:list-item>
            <text:list-item>
              <text:p text:style-name="P84">diagnostics</text:p>
            </text:list-item>
            <text:list-item>
              <text:p text:style-name="P84">missing properties</text:p>
            </text:list-item>
            <text:list-item>
              <text:p text:style-name="P84">invalid references</text:p>
            </text:list-item>
          </text:list>
        </text:list-item>
        <text:list-item>
          <text:p text:style-name="P84">Wire <text:span text:style-name="Source_20_Text">POST /evaluate</text:span>.</text:p>
        </text:list-item>
        <text:list-item>
          <text:p text:style-name="P84">Frontend Evaluate button should call backend evaluation if backend is available; otherwise it may fall back to frontend evaluation.</text:p>
        </text:list-item>
        <text:list-item>
          <text:p text:style-name="P84">Show backend evaluation results in inspector/solution panel.</text:p>
        </text:list-item>
      </text:list>
      <text:p text:style-name="Text_20_body">Testing:</text:p>
      <text:list xml:id="list3179234814" text:style-name="L83">
        <text:list-item>
          <text:p text:style-name="P85">Add pytest tests for backend evaluator:</text:p>
          <text:list>
            <text:list-item>
              <text:p text:style-name="P85">TaggedSum over products</text:p>
            </text:list-item>
            <text:list-item>
              <text:p text:style-name="P85">missing property</text:p>
            </text:list-item>
            <text:list-item>
              <text:p text:style-name="P85">objective evaluation</text:p>
            </text:list-item>
            <text:list-item>
              <text:p text:style-name="P85">constraint evaluation</text:p>
            </text:list-item>
          </text:list>
        </text:list-item>
        <text:list-item>
          <text:p text:style-name="P85">Add frontend API tests if needed.</text:p>
        </text:list-item>
        <text:list-item>
          <text:p text:style-name="P85">Run backend and frontend tests.</text:p>
        </text:list-item>
      </text:list>
      <text:p text:style-name="Text_20_body">Acceptance criteria:</text:p>
      <text:list xml:id="list3030034656" text:style-name="L84">
        <text:list-item>
          <text:p text:style-name="P86">Backend <text:span text:style-name="Source_20_Text">/evaluate</text:span> returns correct value for a simple production-cost TaggedSum.</text:p>
        </text:list-item>
        <text:list-item>
          <text:p text:style-name="P86">Missing values generate diagnostics, not crashes.</text:p>
        </text:list-item>
        <text:list-item>
          <text:p text:style-name="P86">Frontend displays evaluation results.</text:p>
        </text:list-item>
        <text:list-item>
          <text:p text:style-name="P86">Existing frontend evaluator behavior is not broken.</text:p>
        </text:list-item>
      </text:list>
      <text:p text:style-name="Text_20_body">Constraints:</text:p>
      <text:list xml:id="list1720168382" text:style-name="L85">
        <text:list-item>
          <text:p text:style-name="P87">Keep evaluator independent from CVXPY.</text:p>
        </text:list-item>
        <text:list-item>
          <text:p text:style-name="P87"><text:soft-page-break/>Do not implement optimization solving yet.</text:p>
        </text:list-item>
        <text:list-item>
          <text:p text:style-name="P87">Preserve existing functionality.</text:p>
        </text:list-item>
      </text:list>
      <text:p text:style-name="P6"/>
      <text:p text:style-name="P6"/>
      <text:p text:style-name="P46">Batch 5 / Prompt 5 — Minimal CVXPY compiler and solve endpoint</text:p>
      <text:p text:style-name="Text_20_body">Context:<text:line-break/>Atlas should compile the Atlas IR into a real CVXPY problem and solve simple optimization models. The first supported vertical slice should cover continuous scalar decisions, constants, TaggedSum expressions, linear objectives, and simple linear constraints.</text:p>
      <text:p text:style-name="Text_20_body">Current state:<text:line-break/>Backend validates and evaluates Atlas IR.</text:p>
      <text:p text:style-name="Text_20_body">Goal:<text:line-break/>Implement minimal CVXPY solving for a simple linear model.</text:p>
      <text:p text:style-name="Text_20_body">Detailed requirements:</text:p>
      <text:list xml:id="list2384368373" text:style-name="L86">
        <text:list-item>
          <text:p text:style-name="P88">Add CVXPY dependency to backend.</text:p>
        </text:list-item>
        <text:list-item>
          <text:p text:style-name="P88">Define how Decision cards compile to CVXPY variables.</text:p>
        </text:list-item>
        <text:list-item>
          <text:p text:style-name="P88">Support continuous scalar decision variables initially.</text:p>
        </text:list-item>
        <text:list-item>
          <text:p text:style-name="P88">Decision values may be referenced through card properties.</text:p>
        </text:list-item>
        <text:list-item>
          <text:p text:style-name="P88">Compile:</text:p>
          <text:list>
            <text:list-item>
              <text:p text:style-name="P88">constants</text:p>
            </text:list-item>
            <text:list-item>
              <text:p text:style-name="P88">property references</text:p>
            </text:list-item>
            <text:list-item>
              <text:p text:style-name="P88">multiplication by numeric constants</text:p>
            </text:list-item>
            <text:list-item>
              <text:p text:style-name="P88">addition</text:p>
            </text:list-item>
            <text:list-item>
              <text:p text:style-name="P88">TaggedSum</text:p>
            </text:list-item>
            <text:list-item>
              <text:p text:style-name="P88">objective with Minimize/Maximize</text:p>
            </text:list-item>
            <text:list-item>
              <text:p text:style-name="P88">constraints with &lt;=, &gt;=, ==</text:p>
            </text:list-item>
          </text:list>
        </text:list-item>
        <text:list-item>
          <text:p text:style-name="P88">Return:</text:p>
          <text:list>
            <text:list-item>
              <text:p text:style-name="P88">solver status</text:p>
            </text:list-item>
            <text:list-item>
              <text:p text:style-name="P88">objective value</text:p>
            </text:list-item>
            <text:list-item>
              <text:p text:style-name="P88">variable values</text:p>
            </text:list-item>
            <text:list-item>
              <text:p text:style-name="P88">constraint values/residuals where feasible</text:p>
            </text:list-item>
            <text:list-item>
              <text:p text:style-name="P88">diagnostics</text:p>
            </text:list-item>
            <text:list-item>
              <text:p text:style-name="P88">generated readable CVXPY code string</text:p>
            </text:list-item>
          </text:list>
        </text:list-item>
        <text:list-item>
          <text:p text:style-name="P88"><text:soft-page-break/>Wire <text:span text:style-name="Source_20_Text">POST /solve</text:span>.</text:p>
        </text:list-item>
        <text:list-item>
          <text:p text:style-name="P88">Wire <text:span text:style-name="Source_20_Text">POST /generate_code</text:span>.</text:p>
        </text:list-item>
        <text:list-item>
          <text:p text:style-name="P88">Frontend Solve button calls backend <text:span text:style-name="Source_20_Text">/solve</text:span>.</text:p>
        </text:list-item>
        <text:list-item>
          <text:p text:style-name="P88">Frontend Generate Code or Export shows generated CVXPY code.</text:p>
        </text:list-item>
      </text:list>
      <text:p text:style-name="Text_20_body">Testing:</text:p>
      <text:list xml:id="list2510172569" text:style-name="L87">
        <text:list-item>
          <text:p text:style-name="P89">Add pytest tests for a minimal LP:</text:p>
          <text:list>
            <text:list-item>
              <text:p text:style-name="P89">two product cards</text:p>
            </text:list-item>
            <text:list-item>
              <text:p text:style-name="P89">production decision property</text:p>
            </text:list-item>
            <text:list-item>
              <text:p text:style-name="P89">unit cost</text:p>
            </text:list-item>
            <text:list-item>
              <text:p text:style-name="P89">capacity constraint</text:p>
            </text:list-item>
            <text:list-item>
              <text:p text:style-name="P89">objective minimize cost or maximize profit</text:p>
            </text:list-item>
          </text:list>
        </text:list-item>
        <text:list-item>
          <text:p text:style-name="P89">Add test for infeasible model if easy.</text:p>
        </text:list-item>
        <text:list-item>
          <text:p text:style-name="P89">Add test for invalid references.</text:p>
        </text:list-item>
        <text:list-item>
          <text:p text:style-name="P89">Run backend tests.</text:p>
        </text:list-item>
        <text:list-item>
          <text:p text:style-name="P89">Run frontend typecheck/build.</text:p>
        </text:list-item>
      </text:list>
      <text:p text:style-name="Text_20_body">Acceptance criteria:</text:p>
      <text:list xml:id="list920051927" text:style-name="L88">
        <text:list-item>
          <text:p text:style-name="P90">User can build a tiny model visually and solve it.</text:p>
        </text:list-item>
        <text:list-item>
          <text:p text:style-name="P90">Solve returns objective value and decision values.</text:p>
        </text:list-item>
        <text:list-item>
          <text:p text:style-name="P90">Generated code is shown somewhere in the UI.</text:p>
        </text:list-item>
        <text:list-item>
          <text:p text:style-name="P90">Backend errors are readable.</text:p>
        </text:list-item>
        <text:list-item>
          <text:p text:style-name="P90">Frontend remains stable.</text:p>
        </text:list-item>
      </text:list>
      <text:p text:style-name="Text_20_body">Constraints:</text:p>
      <text:list xml:id="list3128419229" text:style-name="L89">
        <text:list-item>
          <text:p text:style-name="P91">Keep first compiler intentionally small.</text:p>
        </text:list-item>
        <text:list-item>
          <text:p text:style-name="P91">Do not support integer variables yet.</text:p>
        </text:list-item>
        <text:list-item>
          <text:p text:style-name="P91">Do not support arbitrary nonlinear atoms yet.</text:p>
        </text:list-item>
        <text:list-item>
          <text:p text:style-name="P91">Do not hard-code the test model into the compiler.</text:p>
        </text:list-item>
        <text:list-item>
          <text:p text:style-name="P91">Preserve existing functionality.</text:p>
        </text:list-item>
      </text:list>
      <text:p text:style-name="P6"/>
      <text:p text:style-name="P6"/>
      <text:p text:style-name="P5">BATCH 6</text:p>
      <text:p text:style-name="P7"><text:soft-page-break/></text:p>
      <text:p text:style-name="P46">Batch 6 / Prompt 1 — Solution panel and result-to-card highlighting</text:p>
      <text:p text:style-name="Text_20_body">Context:<text:line-break/>Atlas should make optimization results inspectable. After solving, users need to see solver status, objective value, decision values, constraint diagnostics, and the connection between solution values and the original cards.</text:p>
      <text:p text:style-name="Text_20_body">Current state:<text:line-break/>Backend supports minimal CVXPY solve and returns structured solution data. Frontend Solve button calls backend.</text:p>
      <text:p text:style-name="Text_20_body">Goal:<text:line-break/>Implement a useful Solution panel.</text:p>
      <text:p text:style-name="Text_20_body">Detailed requirements:</text:p>
      <text:list xml:id="list3528805224" text:style-name="L90">
        <text:list-item>
          <text:p text:style-name="P92">Add or complete a persistent Solution panel in the right dock.</text:p>
        </text:list-item>
        <text:list-item>
          <text:p text:style-name="P92">Display:</text:p>
          <text:list>
            <text:list-item>
              <text:p text:style-name="P92">solver status</text:p>
            </text:list-item>
            <text:list-item>
              <text:p text:style-name="P92">objective value</text:p>
            </text:list-item>
            <text:list-item>
              <text:p text:style-name="P92">generated diagnostics</text:p>
            </text:list-item>
            <text:list-item>
              <text:p text:style-name="P92">decision variable values</text:p>
            </text:list-item>
            <text:list-item>
              <text:p text:style-name="P92">constraint values/residuals if returned</text:p>
            </text:list-item>
            <text:list-item>
              <text:p text:style-name="P92">generated CVXPY code in collapsible section</text:p>
            </text:list-item>
          </text:list>
        </text:list-item>
        <text:list-item>
          <text:p text:style-name="P92">Clicking a decision result should select/highlight the originating Decision card or property.</text:p>
        </text:list-item>
        <text:list-item>
          <text:p text:style-name="P92">Clicking a constraint result should select/highlight the originating Constraint card and its dependencies.</text:p>
        </text:list-item>
        <text:list-item>
          <text:p text:style-name="P92">Show clear empty state before solving.</text:p>
        </text:list-item>
        <text:list-item>
          <text:p text:style-name="P92">Show loading state while solving.</text:p>
        </text:list-item>
        <text:list-item>
          <text:p text:style-name="P92">Show readable error state if solving fails.</text:p>
        </text:list-item>
        <text:list-item>
          <text:p text:style-name="P92">Preserve the last successful solution until the model changes; mark it stale after edits.</text:p>
        </text:list-item>
      </text:list>
      <text:p text:style-name="Text_20_body">Testing:</text:p>
      <text:list xml:id="list3654170384" text:style-name="L91">
        <text:list-item>
          <text:p text:style-name="P93">Add tests for rendering solution states:</text:p>
          <text:list>
            <text:list-item>
              <text:p text:style-name="P93">empty</text:p>
            </text:list-item>
            <text:list-item>
              <text:p text:style-name="P93">loading</text:p>
            </text:list-item>
            <text:list-item>
              <text:p text:style-name="P93">success</text:p>
            </text:list-item>
            <text:list-item>
              <text:p text:style-name="P93">error</text:p>
            </text:list-item>
            <text:list-item>
              <text:p text:style-name="P93">stale</text:p>
            </text:list-item>
          </text:list>
        </text:list-item>
        <text:list-item>
          <text:p text:style-name="P93"><text:soft-page-break/>Add tests for mapping solution variable IDs back to cards if helpers exist.</text:p>
        </text:list-item>
        <text:list-item>
          <text:p text:style-name="P93">Run lint/typecheck/build and backend tests.</text:p>
        </text:list-item>
      </text:list>
      <text:p text:style-name="Text_20_body">Acceptance criteria:</text:p>
      <text:list xml:id="list147498420" text:style-name="L92">
        <text:list-item>
          <text:p text:style-name="P94">After Solve, solution results are visible without opening a popup.</text:p>
        </text:list-item>
        <text:list-item>
          <text:p text:style-name="P94">Decision values can be traced back to cards.</text:p>
        </text:list-item>
        <text:list-item>
          <text:p text:style-name="P94">Constraint diagnostics can be traced back to cards.</text:p>
        </text:list-item>
        <text:list-item>
          <text:p text:style-name="P94">Generated code is available.</text:p>
        </text:list-item>
        <text:list-item>
          <text:p text:style-name="P94">Model edits mark solution as stale.</text:p>
        </text:list-item>
      </text:list>
      <text:p text:style-name="Text_20_body">Constraints:</text:p>
      <text:list xml:id="list1730113457" text:style-name="L93">
        <text:list-item>
          <text:p text:style-name="P95">Do not implement advanced sensitivity analysis yet.</text:p>
        </text:list-item>
        <text:list-item>
          <text:p text:style-name="P95">Do not hide backend diagnostics.</text:p>
        </text:list-item>
        <text:list-item>
          <text:p text:style-name="P95">Preserve existing functionality.</text:p>
        </text:list-item>
      </text:list>
      <text:p text:style-name="P6"/>
      <text:p text:style-name="P6"/>
      <text:p text:style-name="P6"/>
      <text:p text:style-name="P46">Batch 6 / Prompt 2 — Evaluate-at-current and evaluate-at-solution modes</text:p>
      <text:p text:style-name="Text_20_body">Context:<text:line-break/>Atlas needs an Evaluate button that can evaluate any expression either at current initialization/manual values or at the latest solution. This is essential for debugging and understanding objective terms and constraints.</text:p>
      <text:p text:style-name="Text_20_body">Current state:<text:line-break/>Evaluation exists and Solve returns solution values.</text:p>
      <text:p text:style-name="Text_20_body">Goal:<text:line-break/>Add explicit evaluation modes.</text:p>
      <text:p text:style-name="Text_20_body">Detailed requirements:</text:p>
      <text:list xml:id="list238357663" text:style-name="L94">
        <text:list-item>
          <text:p text:style-name="P96">Add evaluation mode selector:</text:p>
          <text:list>
            <text:list-item>
              <text:p text:style-name="P96">current values / initialization</text:p>
            </text:list-item>
            <text:list-item>
              <text:p text:style-name="P96">latest solution</text:p>
            </text:list-item>
          </text:list>
        </text:list-item>
        <text:list-item>
          <text:p text:style-name="P96">Evaluation should work for:</text:p>
          <text:list>
            <text:list-item>
              <text:p text:style-name="P96">selected Function card</text:p>
            </text:list-item>
            <text:list-item>
              <text:p text:style-name="P96">selected Objective card</text:p>
            </text:list-item>
            <text:list-item>
              <text:p text:style-name="P96">selected Constraint card</text:p>
            </text:list-item>
            <text:list-item>
              <text:p text:style-name="P96">selected objective term if supported</text:p>
            </text:list-item>
          </text:list>
        </text:list-item>
        <text:list-item>
          <text:p text:style-name="P96"><text:soft-page-break/>Inspector should show:</text:p>
          <text:list>
            <text:list-item>
              <text:p text:style-name="P96">evaluated value</text:p>
            </text:list-item>
            <text:list-item>
              <text:p text:style-name="P96">evaluation mode</text:p>
            </text:list-item>
            <text:list-item>
              <text:p text:style-name="P96">participating cards</text:p>
            </text:list-item>
            <text:list-item>
              <text:p text:style-name="P96">missing values/diagnostics</text:p>
            </text:list-item>
          </text:list>
        </text:list-item>
        <text:list-item>
          <text:p text:style-name="P96">If latest solution is stale, show a warning.</text:p>
        </text:list-item>
        <text:list-item>
          <text:p text:style-name="P96">If latest solution is unavailable, disable or warn for solution-based evaluation.</text:p>
        </text:list-item>
        <text:list-item>
          <text:p text:style-name="P96">Keep backend evaluator as primary if backend is available.</text:p>
        </text:list-item>
        <text:list-item>
          <text:p text:style-name="P96">Use frontend fallback only if already implemented and reliable.</text:p>
        </text:list-item>
      </text:list>
      <text:p text:style-name="Text_20_body">Testing:</text:p>
      <text:list xml:id="list1764733839" text:style-name="L95">
        <text:list-item>
          <text:p text:style-name="P97">Add tests for evaluation mode state.</text:p>
        </text:list-item>
        <text:list-item>
          <text:p text:style-name="P97">Add tests for stale-solution warning.</text:p>
        </text:list-item>
        <text:list-item>
          <text:p text:style-name="P97">Add backend tests if evaluator needs solution-value input.</text:p>
        </text:list-item>
        <text:list-item>
          <text:p text:style-name="P97">Run frontend and backend tests.</text:p>
        </text:list-item>
      </text:list>
      <text:p text:style-name="Text_20_body">Acceptance criteria:</text:p>
      <text:list xml:id="list4229336854" text:style-name="L96">
        <text:list-item>
          <text:p text:style-name="P98">User can evaluate a TaggedSum before solving.</text:p>
        </text:list-item>
        <text:list-item>
          <text:p text:style-name="P98">User can solve and then evaluate the same expression at the solution.</text:p>
        </text:list-item>
        <text:list-item>
          <text:p text:style-name="P98">Stale solution warnings are visible.</text:p>
        </text:list-item>
        <text:list-item>
          <text:p text:style-name="P98">Missing values are handled clearly.</text:p>
        </text:list-item>
        <text:list-item>
          <text:p text:style-name="P98">Existing Solve workflow still works.</text:p>
        </text:list-item>
      </text:list>
      <text:p text:style-name="Text_20_body">Constraints:</text:p>
      <text:list xml:id="list1915413116" text:style-name="L97">
        <text:list-item>
          <text:p text:style-name="P99">Do not implement arbitrary formula parsing.</text:p>
        </text:list-item>
        <text:list-item>
          <text:p text:style-name="P99">Do not silently use stale values without warning.</text:p>
        </text:list-item>
        <text:list-item>
          <text:p text:style-name="P99">Preserve existing functionality.</text:p>
        </text:list-item>
      </text:list>
      <text:p text:style-name="P6"/>
      <text:p text:style-name="P6"/>
      <text:p text:style-name="P6"/>
      <text:p text:style-name="P46">Batch 6 / Prompt 3 — Save/load project files and example production planning model</text:p>
      <text:p text:style-name="Text_20_body">Context:<text:line-break/>The app should be demonstrable with a small but real example. We need project save/load and one example model that shows the core workflow: object cards, tags, properties, query-based TaggedSum, objective, constraint, evaluate, solve, solution view.</text:p>
      <text:p text:style-name="Text_20_body"><text:soft-page-break/>Current state:<text:line-break/>The app supports Atlas IR export/import and local storage. Backend can solve minimal models.</text:p>
      <text:p text:style-name="Text_20_body">Goal:<text:line-break/>Add robust project save/load and a built-in example model.</text:p>
      <text:p text:style-name="Text_20_body">Detailed requirements:</text:p>
      <text:list xml:id="list364690918" text:style-name="L98">
        <text:list-item>
          <text:p text:style-name="P100">Add Save Project as JSON.</text:p>
        </text:list-item>
        <text:list-item>
          <text:p text:style-name="P100">Add Load Project from JSON.</text:p>
        </text:list-item>
        <text:list-item>
          <text:p text:style-name="P100">Keep existing Export IR if present, but make naming clear.</text:p>
        </text:list-item>
        <text:list-item>
          <text:p text:style-name="P100">Add “Load Example” action.</text:p>
        </text:list-item>
        <text:list-item>
          <text:p text:style-name="P100">Example model:</text:p>
          <text:list>
            <text:list-item>
              <text:p text:style-name="P100">three Product-like Object cards</text:p>
            </text:list-item>
            <text:list-item>
              <text:p text:style-name="P100">each tagged <text:span text:style-name="Source_20_Text">type = product</text:span>, <text:span text:style-name="Source_20_Text">factory = A</text:span></text:p>
            </text:list-item>
            <text:list-item>
              <text:p text:style-name="P100">properties:</text:p>
              <text:list>
                <text:list-item>
                  <text:p text:style-name="P100">unit_profit or unit_cost</text:p>
                </text:list-item>
                <text:list-item>
                  <text:p text:style-name="P100">machine_hours_per_unit</text:p>
                </text:list-item>
                <text:list-item>
                  <text:p text:style-name="P100">production_quantity as decision reference</text:p>
                </text:list-item>
              </text:list>
            </text:list-item>
            <text:list-item>
              <text:p text:style-name="P100">one TaggedSum for profit or cost</text:p>
            </text:list-item>
            <text:list-item>
              <text:p text:style-name="P100">one TaggedSum for machine hours</text:p>
            </text:list-item>
            <text:list-item>
              <text:p text:style-name="P100">one Objective</text:p>
            </text:list-item>
            <text:list-item>
              <text:p text:style-name="P100">one capacity Constraint</text:p>
            </text:list-item>
          </text:list>
        </text:list-item>
        <text:list-item>
          <text:p text:style-name="P100">The example should solve successfully.</text:p>
        </text:list-item>
        <text:list-item>
          <text:p text:style-name="P100">Place cards neatly on the workbench.</text:p>
        </text:list-item>
        <text:list-item>
          <text:p text:style-name="P100">Add documentation explaining the example.</text:p>
        </text:list-item>
      </text:list>
      <text:p text:style-name="Text_20_body">Testing:</text:p>
      <text:list xml:id="list2300917185" text:style-name="L99">
        <text:list-item>
          <text:p text:style-name="P101">Add roundtrip save/load tests.</text:p>
        </text:list-item>
        <text:list-item>
          <text:p text:style-name="P101">Add test that example model validates.</text:p>
        </text:list-item>
        <text:list-item>
          <text:p text:style-name="P101">Add backend test that example model solves.</text:p>
        </text:list-item>
        <text:list-item>
          <text:p text:style-name="P101">Run frontend and backend tests.</text:p>
        </text:list-item>
      </text:list>
      <text:p text:style-name="Text_20_body">Acceptance criteria:</text:p>
      <text:list xml:id="list133477743" text:style-name="L100">
        <text:list-item>
          <text:p text:style-name="P102">User can load the example model and click Solve successfully.</text:p>
        </text:list-item>
        <text:list-item>
          <text:p text:style-name="P102">User can save the project JSON and reload it.</text:p>
        </text:list-item>
        <text:list-item>
          <text:p text:style-name="P102">Example demonstrates tags, properties, TaggedSum, Objective, Constraint, Evaluate, Solve.</text:p>
        </text:list-item>
        <text:list-item>
          <text:p text:style-name="P102"><text:soft-page-break/>Existing manual modeling remains possible.</text:p>
        </text:list-item>
      </text:list>
      <text:p text:style-name="Text_20_body">Constraints:</text:p>
      <text:list xml:id="list1505514717" text:style-name="L101">
        <text:list-item>
          <text:p text:style-name="P103">Do not hard-code example-specific logic into evaluator/compiler.</text:p>
        </text:list-item>
        <text:list-item>
          <text:p text:style-name="P103">Keep example small.</text:p>
        </text:list-item>
        <text:list-item>
          <text:p text:style-name="P103">Preserve existing functionality.</text:p>
        </text:list-item>
      </text:list>
      <text:p text:style-name="P6"/>
      <text:p text:style-name="P6"/>
      <text:p text:style-name="P6"/>
      <text:p text:style-name="P46">Batch 6 / Prompt 4 — Search, command palette, and quick creation workflow</text:p>
      <text:p text:style-name="Text_20_body">Context:<text:line-break/>Atlas should feel fast and playful. Users need to create cards and find model elements quickly without navigating deep menus. A command palette and search are lightweight ways to improve usability.</text:p>
      <text:p text:style-name="Text_20_body">Current state:<text:line-break/>Core workbench, cards, tags, properties, functions, objectives, constraints, backend solve, solution view, save/load, and example model exist.</text:p>
      <text:p text:style-name="Text_20_body">Goal:<text:line-break/>Implement search and command palette for common actions.</text:p>
      <text:p text:style-name="Text_20_body">Detailed requirements:</text:p>
      <text:list xml:id="list2757908985" text:style-name="L102">
        <text:list-item>
          <text:p text:style-name="P104">Add keyboard shortcut for command palette, e.g. Ctrl/Cmd+K.</text:p>
        </text:list-item>
        <text:list-item>
          <text:p text:style-name="P104">Command palette should support:</text:p>
          <text:list>
            <text:list-item>
              <text:p text:style-name="P104">create Object card</text:p>
            </text:list-item>
            <text:list-item>
              <text:p text:style-name="P104">create Decision card</text:p>
            </text:list-item>
            <text:list-item>
              <text:p text:style-name="P104">create Data card</text:p>
            </text:list-item>
            <text:list-item>
              <text:p text:style-name="P104">create Function card</text:p>
            </text:list-item>
            <text:list-item>
              <text:p text:style-name="P104">create Constraint card</text:p>
            </text:list-item>
            <text:list-item>
              <text:p text:style-name="P104">create Objective card</text:p>
            </text:list-item>
            <text:list-item>
              <text:p text:style-name="P104">create from template</text:p>
            </text:list-item>
            <text:list-item>
              <text:p text:style-name="P104">load example</text:p>
            </text:list-item>
            <text:list-item>
              <text:p text:style-name="P104">save project</text:p>
            </text:list-item>
            <text:list-item>
              <text:p text:style-name="P104">export IR</text:p>
            </text:list-item>
            <text:list-item>
              <text:p text:style-name="P104">evaluate selected</text:p>
            </text:list-item>
            <text:list-item>
              <text:p text:style-name="P104">solve</text:p>
            </text:list-item>
          </text:list>
        </text:list-item>
        <text:list-item>
          <text:p text:style-name="P104">Add card search by:</text:p>
          <text:list>
            <text:list-item>
              <text:p text:style-name="P104"><text:soft-page-break/>title</text:p>
            </text:list-item>
            <text:list-item>
              <text:p text:style-name="P104">card type</text:p>
            </text:list-item>
            <text:list-item>
              <text:p text:style-name="P104">tag key/value</text:p>
            </text:list-item>
            <text:list-item>
              <text:p text:style-name="P104">property name</text:p>
            </text:list-item>
          </text:list>
        </text:list-item>
        <text:list-item>
          <text:p text:style-name="P104">Search results should select/focus card on workbench.</text:p>
        </text:list-item>
        <text:list-item>
          <text:p text:style-name="P104">Keep UI simple and robust.</text:p>
        </text:list-item>
        <text:list-item>
          <text:p text:style-name="P104">Add visible Search button in toolbar if not already present.</text:p>
        </text:list-item>
      </text:list>
      <text:p text:style-name="Text_20_body">Testing:</text:p>
      <text:list xml:id="list4200611763" text:style-name="L103">
        <text:list-item>
          <text:p text:style-name="P105">Add tests for search helper functions.</text:p>
        </text:list-item>
        <text:list-item>
          <text:p text:style-name="P105">Add tests for command registration if helper exists.</text:p>
        </text:list-item>
        <text:list-item>
          <text:p text:style-name="P105">Add render tests if feasible.</text:p>
        </text:list-item>
        <text:list-item>
          <text:p text:style-name="P105">Run lint/typecheck/build.</text:p>
        </text:list-item>
      </text:list>
      <text:p text:style-name="Text_20_body">Acceptance criteria:</text:p>
      <text:list xml:id="list1277530683" text:style-name="L104">
        <text:list-item>
          <text:p text:style-name="P106">User can press Ctrl/Cmd+K and create a card.</text:p>
        </text:list-item>
        <text:list-item>
          <text:p text:style-name="P106">User can search for <text:span text:style-name="Source_20_Text">product</text:span> and find product-tagged cards.</text:p>
        </text:list-item>
        <text:list-item>
          <text:p text:style-name="P106">Selecting a search result focuses/selects the card.</text:p>
        </text:list-item>
        <text:list-item>
          <text:p text:style-name="P106">Existing toolbar actions still work.</text:p>
        </text:list-item>
      </text:list>
      <text:p text:style-name="Text_20_body">Constraints:</text:p>
      <text:list xml:id="list3953449668" text:style-name="L105">
        <text:list-item>
          <text:p text:style-name="P107">Do not introduce complex fuzzy-search dependency unless justified.</text:p>
        </text:list-item>
        <text:list-item>
          <text:p text:style-name="P107">Do not break existing keyboard shortcuts.</text:p>
        </text:list-item>
        <text:list-item>
          <text:p text:style-name="P107">Preserve existing functionality.</text:p>
        </text:list-item>
      </text:list>
      <text:p text:style-name="P6"/>
      <text:p text:style-name="P6"/>
      <text:p text:style-name="P6"/>
      <text:p text:style-name="P46">Batch 6 / Prompt 5 — Regression tests, cleanup, and prototype readiness pass</text:p>
      <text:p text:style-name="Text_20_body">Context:<text:line-break/>The first Atlas Optimization Suite prototype should be stable enough to use for experimentation and further Codex tasks. This pass should clean up rough edges, add regression tests, and ensure there are no preview-only broken actions.</text:p>
      <text:p text:style-name="Text_20_body">Current state:<text:line-break/>The app has a complete vertical slice: card workbench, typed tags, properties, templates, queries, TaggedSum, objectives, constraints, evaluate, solve, solution view, save/load, and example model.</text:p>
      <text:p text:style-name="Text_20_body">Goal:<text:line-break/>Stabilize the prototype.</text:p>
      <text:p text:style-name="Text_20_body"><text:soft-page-break/>Detailed requirements:</text:p>
      <text:list xml:id="list71407850" text:style-name="L106">
        <text:list-item>
          <text:p text:style-name="P108">Audit all toolbar buttons, menu items, inspector actions, and card actions.</text:p>
        </text:list-item>
        <text:list-item>
          <text:p text:style-name="P108">Ensure every visible action either works or is clearly disabled with an explanation.</text:p>
        </text:list-item>
        <text:list-item>
          <text:p text:style-name="P108">Remove or fix preview-only functionality.</text:p>
        </text:list-item>
        <text:list-item>
          <text:p text:style-name="P108">Fix obvious UI bugs in:</text:p>
          <text:list>
            <text:list-item>
              <text:p text:style-name="P108">card selection</text:p>
            </text:list-item>
            <text:list-item>
              <text:p text:style-name="P108">dragging</text:p>
            </text:list-item>
            <text:list-item>
              <text:p text:style-name="P108">local storage persistence</text:p>
            </text:list-item>
            <text:list-item>
              <text:p text:style-name="P108">query highlighting</text:p>
            </text:list-item>
            <text:list-item>
              <text:p text:style-name="P108">dependency highlighting</text:p>
            </text:list-item>
            <text:list-item>
              <text:p text:style-name="P108">objective/constraint editing</text:p>
            </text:list-item>
            <text:list-item>
              <text:p text:style-name="P108">solve/evaluate loading/error states</text:p>
            </text:list-item>
          </text:list>
        </text:list-item>
        <text:list-item>
          <text:p text:style-name="P108">Add regression tests for the core user path:</text:p>
          <text:list>
            <text:list-item>
              <text:p text:style-name="P108">load example</text:p>
            </text:list-item>
            <text:list-item>
              <text:p text:style-name="P108">inspect cards</text:p>
            </text:list-item>
            <text:list-item>
              <text:p text:style-name="P108">evaluate objective</text:p>
            </text:list-item>
            <text:list-item>
              <text:p text:style-name="P108">solve</text:p>
            </text:list-item>
            <text:list-item>
              <text:p text:style-name="P108">view solution</text:p>
            </text:list-item>
            <text:list-item>
              <text:p text:style-name="P108">save project</text:p>
            </text:list-item>
            <text:list-item>
              <text:p text:style-name="P108">reload project</text:p>
            </text:list-item>
          </text:list>
        </text:list-item>
        <text:list-item>
          <text:p text:style-name="P108">Add backend regression tests for:</text:p>
          <text:list>
            <text:list-item>
              <text:p text:style-name="P108">validation</text:p>
            </text:list-item>
            <text:list-item>
              <text:p text:style-name="P108">evaluation</text:p>
            </text:list-item>
            <text:list-item>
              <text:p text:style-name="P108">CVXPY solve</text:p>
            </text:list-item>
            <text:list-item>
              <text:p text:style-name="P108">invalid model diagnostics</text:p>
            </text:list-item>
          </text:list>
        </text:list-item>
        <text:list-item>
          <text:p text:style-name="P108">Update README with:</text:p>
          <text:list>
            <text:list-item>
              <text:p text:style-name="P108">setup instructions</text:p>
            </text:list-item>
            <text:list-item>
              <text:p text:style-name="P108">frontend start</text:p>
            </text:list-item>
            <text:list-item>
              <text:p text:style-name="P108">backend start</text:p>
            </text:list-item>
            <text:list-item>
              <text:p text:style-name="P108">test commands</text:p>
            </text:list-item>
            <text:list-item>
              <text:p text:style-name="P108">current supported modeling subset</text:p>
            </text:list-item>
            <text:list-item>
              <text:p text:style-name="P108">known limitations</text:p>
            </text:list-item>
          </text:list>
        </text:list-item>
        <text:list-item>
          <text:p text:style-name="P108"><text:soft-page-break/>Ensure TypeScript types are clean.</text:p>
        </text:list-item>
        <text:list-item>
          <text:p text:style-name="P108">Ensure Python tests pass.</text:p>
        </text:list-item>
      </text:list>
      <text:p text:style-name="Text_20_body">Testing:</text:p>
      <text:list xml:id="list2851216660" text:style-name="L107">
        <text:list-item>
          <text:p text:style-name="P109">Run all frontend tests.</text:p>
        </text:list-item>
        <text:list-item>
          <text:p text:style-name="P109">Run frontend lint/typecheck/build.</text:p>
        </text:list-item>
        <text:list-item>
          <text:p text:style-name="P109">Run all backend tests.</text:p>
        </text:list-item>
        <text:list-item>
          <text:p text:style-name="P109">Document any remaining failures explicitly in README or a <text:span text:style-name="Source_20_Text">KNOWN_LIMITATIONS.md</text:span>.</text:p>
        </text:list-item>
      </text:list>
      <text:p text:style-name="Text_20_body">Acceptance criteria:</text:p>
      <text:list xml:id="list479794962" text:style-name="L108">
        <text:list-item>
          <text:p text:style-name="P110">Prototype can be started from README instructions.</text:p>
        </text:list-item>
        <text:list-item>
          <text:p text:style-name="P110">Example model works end-to-end.</text:p>
        </text:list-item>
        <text:list-item>
          <text:p text:style-name="P110">No visible action silently does nothing.</text:p>
        </text:list-item>
        <text:list-item>
          <text:p text:style-name="P110">Tests cover core workflow.</text:p>
        </text:list-item>
        <text:list-item>
          <text:p text:style-name="P110">Known limitations are documented.</text:p>
        </text:list-item>
        <text:list-item>
          <text:p text:style-name="P110">Existing functionality is preserved.</text:p>
        </text:list-item>
      </text:list>
      <text:p text:style-name="Text_20_body">Constraints:</text:p>
      <text:list xml:id="list946361210" text:style-name="L109">
        <text:list-item>
          <text:p text:style-name="P111">Do not add large new features in this cleanup pass.</text:p>
        </text:list-item>
        <text:list-item>
          <text:p text:style-name="P111">Prioritize correctness and usability over visual polish.</text:p>
        </text:list-item>
        <text:list-item>
          <text:p text:style-name="P111">Preserve existing functionality.</text:p>
        </text:list-item>
      </text:list>
      <text:p text:style-name="P6"/>
      <text:p text:style-name="P6"/>
      <text:p text:style-name="P5">BATCH 7</text:p>
      <text:p text:style-name="P7"/>
      <text:p text:style-name="P47">Batch 7 / Prompt 1 — Linear expression editor improvements</text:p>
      <text:p text:style-name="Text_20_body">Context:<text:line-break/>The first prototype supports simple TaggedSum expressions. Now improve the expression editor enough to make small linear optimization models pleasant without building a full symbolic algebra system.</text:p>
      <text:p text:style-name="Text_20_body">Goal:<text:line-break/>Add a structured linear expression editor.</text:p>
      <text:p text:style-name="Text_20_body">Detailed requirements:</text:p>
      <text:list xml:id="list3553398635" text:style-name="L110">
        <text:list-item>
          <text:p text:style-name="P112">Support expression terms of the form:</text:p>
          <text:list>
            <text:list-item>
              <text:p text:style-name="P112"><text:soft-page-break/>property</text:p>
            </text:list-item>
            <text:list-item>
              <text:p text:style-name="P112">numeric literal × property</text:p>
            </text:list-item>
            <text:list-item>
              <text:p text:style-name="P112">property × property only if one side is constant-valued</text:p>
            </text:list-item>
            <text:list-item>
              <text:p text:style-name="P112">sum of terms</text:p>
            </text:list-item>
          </text:list>
        </text:list-item>
        <text:list-item>
          <text:p text:style-name="P112">Allow users to add/remove/reorder terms.</text:p>
        </text:list-item>
        <text:list-item>
          <text:p text:style-name="P112">Show clear warnings for unsupported nonlinear combinations.</text:p>
        </text:list-item>
        <text:list-item>
          <text:p text:style-name="P112">Show symbolic preview and evaluation preview.</text:p>
        </text:list-item>
        <text:list-item>
          <text:p text:style-name="P112">Keep all expressions JSON-serializable.</text:p>
        </text:list-item>
        <text:list-item>
          <text:p text:style-name="P112">Ensure generated CVXPY still supports the valid subset.</text:p>
        </text:list-item>
      </text:list>
      <text:p text:style-name="Text_20_body">Testing:</text:p>
      <text:list xml:id="list2950168210" text:style-name="L111">
        <text:list-item>
          <text:p text:style-name="P113">Unit tests for expression validation.</text:p>
        </text:list-item>
        <text:list-item>
          <text:p text:style-name="P113">Backend tests for compiling valid linear expressions.</text:p>
        </text:list-item>
        <text:list-item>
          <text:p text:style-name="P113">Tests that invalid nonlinear expressions produce diagnostics.</text:p>
        </text:list-item>
      </text:list>
      <text:p text:style-name="Text_20_body">Acceptance criteria:</text:p>
      <text:list xml:id="list902145808" text:style-name="L112">
        <text:list-item>
          <text:p text:style-name="P114">User can build <text:span text:style-name="Source_20_Text">2 * production_quantity + 5 * storage_quantity</text:span>.</text:p>
        </text:list-item>
        <text:list-item>
          <text:p text:style-name="P114">Invalid nonlinear terms are blocked or warned.</text:p>
        </text:list-item>
        <text:list-item>
          <text:p text:style-name="P114">Existing example model still solves.</text:p>
        </text:list-item>
      </text:list>
      <text:p text:style-name="P7"/>
      <text:p text:style-name="P6"/>
      <text:p text:style-name="P6"/>
      <text:p text:style-name="P46">Batch 7 / Prompt 2 — Decision card variable types</text:p>
      <text:p text:style-name="Text_20_body">Context:<text:line-break/>The MVP supports continuous scalar decisions. Atlas should next distinguish continuous, integer, binary, vector, and indexed decisions at the card level.</text:p>
      <text:p text:style-name="Text_20_body">Goal:<text:line-break/>Extend Decision cards with variable metadata.</text:p>
      <text:p text:style-name="Text_20_body">Detailed requirements:</text:p>
      <text:list xml:id="list569290604" text:style-name="L113">
        <text:list-item>
          <text:p text:style-name="P115">Add decision metadata:</text:p>
          <text:list>
            <text:list-item>
              <text:p text:style-name="P115">variableType: continuous | integer | binary</text:p>
            </text:list-item>
            <text:list-item>
              <text:p text:style-name="P115">shape: scalar initially, vector later</text:p>
            </text:list-item>
            <text:list-item>
              <text:p text:style-name="P115">lowerBound optional</text:p>
            </text:list-item>
            <text:list-item>
              <text:p text:style-name="P115">upperBound optional</text:p>
            </text:list-item>
            <text:list-item>
              <text:p text:style-name="P115">initialValue optional</text:p>
            </text:list-item>
          </text:list>
        </text:list-item>
        <text:list-item>
          <text:p text:style-name="P115"><text:soft-page-break/>Show decision metadata on cards and in inspector.</text:p>
        </text:list-item>
        <text:list-item>
          <text:p text:style-name="P115">Compile continuous, integer, and binary scalar decisions to CVXPY.</text:p>
        </text:list-item>
        <text:list-item>
          <text:p text:style-name="P115">Show solver/backend warning if no installed solver supports requested mixed-integer problem.</text:p>
        </text:list-item>
        <text:list-item>
          <text:p text:style-name="P115">Keep existing continuous models working.</text:p>
        </text:list-item>
      </text:list>
      <text:p text:style-name="Text_20_body">Testing:</text:p>
      <text:list xml:id="list562008212" text:style-name="L114">
        <text:list-item>
          <text:p text:style-name="P116">Unit tests for decision metadata.</text:p>
        </text:list-item>
        <text:list-item>
          <text:p text:style-name="P116">Backend tests for continuous and binary variable compilation.</text:p>
        </text:list-item>
        <text:list-item>
          <text:p text:style-name="P116">Invalid bound tests.</text:p>
        </text:list-item>
      </text:list>
      <text:p text:style-name="Text_20_body">Acceptance criteria:</text:p>
      <text:list xml:id="list5582476" text:style-name="L115">
        <text:list-item>
          <text:p text:style-name="P117">User can create a binary decision card.</text:p>
        </text:list-item>
        <text:list-item>
          <text:p text:style-name="P117">Backend compiles it correctly where solver support exists.</text:p>
        </text:list-item>
        <text:list-item>
          <text:p text:style-name="P117">Unsupported solver cases produce clear diagnostics.</text:p>
        </text:list-item>
      </text:list>
      <text:p text:style-name="P6"/>
      <text:p text:style-name="P6"/>
      <text:p text:style-name="P46">Batch 7 / Prompt 3 — Data source cards for CSV upload</text:p>
      <text:p text:style-name="Text_20_body">Context:<text:line-break/>Properties may reference external data. The first practical version should support CSV files as Data cards.</text:p>
      <text:p text:style-name="Text_20_body">Goal:<text:line-break/>Implement CSV Data cards.</text:p>
      <text:p text:style-name="Text_20_body">Detailed requirements:</text:p>
      <text:list xml:id="list3496886279" text:style-name="L116">
        <text:list-item>
          <text:p text:style-name="P118">Allow user to upload/import a CSV file in the frontend.</text:p>
        </text:list-item>
        <text:list-item>
          <text:p text:style-name="P118">Represent the CSV as a Data card.</text:p>
        </text:list-item>
        <text:list-item>
          <text:p text:style-name="P118">Show columns, row count, and preview table.</text:p>
        </text:list-item>
        <text:list-item>
          <text:p text:style-name="P118">Allow card properties to reference a CSV column.</text:p>
        </text:list-item>
        <text:list-item>
          <text:p text:style-name="P118">Persist data reference metadata; avoid storing huge data directly if not appropriate.</text:p>
        </text:list-item>
        <text:list-item>
          <text:p text:style-name="P118">Backend should receive enough data to evaluate/solve small examples.</text:p>
        </text:list-item>
        <text:list-item>
          <text:p text:style-name="P118">Add diagnostics for missing columns.</text:p>
        </text:list-item>
      </text:list>
      <text:p text:style-name="Text_20_body">Testing:</text:p>
      <text:list xml:id="list2134062652" text:style-name="L117">
        <text:list-item>
          <text:p text:style-name="P119">Frontend tests for CSV parsing helper.</text:p>
        </text:list-item>
        <text:list-item>
          <text:p text:style-name="P119">Backend tests for evaluating data-referenced properties.</text:p>
        </text:list-item>
        <text:list-item>
          <text:p text:style-name="P119">Roundtrip save/load test for data metadata.</text:p>
        </text:list-item>
      </text:list>
      <text:p text:style-name="Text_20_body"><text:soft-page-break/>Acceptance criteria:</text:p>
      <text:list xml:id="list1636985151" text:style-name="L118">
        <text:list-item>
          <text:p text:style-name="P120">User can create <text:span text:style-name="Source_20_Text">Demand.csv</text:span> card.</text:p>
        </text:list-item>
        <text:list-item>
          <text:p text:style-name="P120">User can link product demand property to a CSV column.</text:p>
        </text:list-item>
        <text:list-item>
          <text:p text:style-name="P120">Missing column references are diagnosed clearly.</text:p>
        </text:list-item>
      </text:list>
      <text:p text:style-name="P6"/>
      <text:p text:style-name="P6"/>
      <text:p text:style-name="P6"/>
      <text:p text:style-name="P46">Batch 7 / Prompt 4 — Indexed sets and time periods</text:p>
      <text:p text:style-name="Text_20_body">Context:<text:line-break/>Many optimization models need time, scenarios, products, machines, or other index sets. Query-based indexing handles object selection, but time periods and scenarios should also be first-class cards.</text:p>
      <text:p text:style-name="Text_20_body">Goal:<text:line-break/>Add simple Index Set cards.</text:p>
      <text:p text:style-name="Text_20_body">Detailed requirements:</text:p>
      <text:list xml:id="list1076560003" text:style-name="L119">
        <text:list-item>
          <text:p text:style-name="P121">Add card subtype or template for Index Set.</text:p>
        </text:list-item>
        <text:list-item>
          <text:p text:style-name="P121">Support finite named elements, e.g. weeks 1..12.</text:p>
        </text:list-item>
        <text:list-item>
          <text:p text:style-name="P121">Allow properties/decisions to declare dependence on an index set.</text:p>
        </text:list-item>
        <text:list-item>
          <text:p text:style-name="P121">Show shape/index metadata in inspector.</text:p>
        </text:list-item>
        <text:list-item>
          <text:p text:style-name="P121">Extend evaluation and symbolic preview to display indexed properties.</text:p>
        </text:list-item>
        <text:list-item>
          <text:p text:style-name="P121">Keep solve support limited if necessary, but validate and represent the structure cleanly.</text:p>
        </text:list-item>
      </text:list>
      <text:p text:style-name="Text_20_body">Testing:</text:p>
      <text:list xml:id="list1694558967" text:style-name="L120">
        <text:list-item>
          <text:p text:style-name="P122">Unit tests for index set model.</text:p>
        </text:list-item>
        <text:list-item>
          <text:p text:style-name="P122">Serialization tests.</text:p>
        </text:list-item>
        <text:list-item>
          <text:p text:style-name="P122">Symbolic preview tests.</text:p>
        </text:list-item>
      </text:list>
      <text:p text:style-name="Text_20_body">Acceptance criteria:</text:p>
      <text:list xml:id="list1094160536" text:style-name="L121">
        <text:list-item>
          <text:p text:style-name="P123">User can create a <text:span text:style-name="Source_20_Text">Weeks</text:span> index set.</text:p>
        </text:list-item>
        <text:list-item>
          <text:p text:style-name="P123">User can declare <text:span text:style-name="Source_20_Text">production_quantity[week]</text:span>.</text:p>
        </text:list-item>
        <text:list-item>
          <text:p text:style-name="P123">UI displays this clearly without solving if compiler does not yet support it.</text:p>
        </text:list-item>
      </text:list>
      <text:p text:style-name="P6"/>
      <text:p text:style-name="P5">Batch 8</text:p>
      <text:p text:style-name="P6"><text:soft-page-break/></text:p>
      <text:p text:style-name="P46">Batch 8 / Prompt 1 — Reuse Data Science Deck canvas, sticky notes, card backgrounds, and visual assets</text:p>
      <text:p text:style-name="Text_20_body">Context:<text:line-break/>You are working inside the existing Data Science Deck folder. This project already contains a canvas/workbench, sticky notes, card backgrounds, grey/green visual styles, symbols, and PDF/card-display logic. For the Atlas Optimization Suite prototype, reuse these existing resources instead of rebuilding the UI from scratch.</text:p>
      <text:p text:style-name="Text_20_body">Goal:<text:line-break/>Adapt the existing Data Science Deck workbench into an Atlas Optimization workbench while preserving reusable canvas/card/sticky-note functionality.</text:p>
      <text:p text:style-name="Text_20_body">Detailed requirements:</text:p>
      <text:list xml:id="list3585081522" text:style-name="L122">
        <text:list-item>
          <text:p text:style-name="P124">Audit the current Data Science Deck canvas, sticky note, card background, card symbol, and PDF display components.</text:p>
        </text:list-item>
        <text:list-item>
          <text:p text:style-name="P124">Identify which components can be reused directly.</text:p>
        </text:list-item>
        <text:list-item>
          <text:p text:style-name="P124">Keep the existing canvas/pan/zoom/card movement behavior if it works.</text:p>
        </text:list-item>
        <text:list-item>
          <text:p text:style-name="P124">Add an Atlas Optimization mode/view that uses:</text:p>
          <text:list>
            <text:list-item>
              <text:p text:style-name="P124">existing card backgrounds</text:p>
            </text:list-item>
            <text:list-item>
              <text:p text:style-name="P124">existing sticky-note/card placement behavior</text:p>
            </text:list-item>
            <text:list-item>
              <text:p text:style-name="P124">existing symbols where useful</text:p>
            </text:list-item>
          </text:list>
        </text:list-item>
        <text:list-item>
          <text:p text:style-name="P124">Do not default to showcasing PDFs in the Atlas view.</text:p>
        </text:list-item>
        <text:list-item>
          <text:p text:style-name="P124">Instead, default cards should use the existing card backgrounds with editable title, keywords, tags, notes, traits, and properties drawn on top.</text:p>
        </text:list-item>
        <text:list-item>
          <text:p text:style-name="P124">PDF display can remain available but should not dominate the Atlas Optimization workflow.</text:p>
        </text:list-item>
        <text:list-item>
          <text:p text:style-name="P124">Preserve existing Data Science Deck functionality unless explicitly incompatible.</text:p>
        </text:list-item>
        <text:list-item>
          <text:p text:style-name="P124">Add documentation describing which existing assets/components are reused.</text:p>
        </text:list-item>
      </text:list>
      <text:p text:style-name="Text_20_body">Testing:</text:p>
      <text:list xml:id="list1324876434" text:style-name="L123">
        <text:list-item>
          <text:p text:style-name="P125">Run existing tests.</text:p>
        </text:list-item>
        <text:list-item>
          <text:p text:style-name="P125">Add or update tests that verify the Atlas view renders.</text:p>
        </text:list-item>
        <text:list-item>
          <text:p text:style-name="P125">Add a manual test checklist:</text:p>
          <text:list>
            <text:list-item>
              <text:p text:style-name="P125">canvas opens</text:p>
            </text:list-item>
            <text:list-item>
              <text:p text:style-name="P125">cards can move</text:p>
            </text:list-item>
            <text:list-item>
              <text:p text:style-name="P125">old Data Science Deck view still works</text:p>
            </text:list-item>
            <text:list-item>
              <text:p text:style-name="P125">Atlas cards use existing backgrounds</text:p>
            </text:list-item>
            <text:list-item>
              <text:p text:style-name="P125">PDF mode still does not crash</text:p>
            </text:list-item>
          </text:list>
        </text:list-item>
      </text:list>
      <text:p text:style-name="Text_20_body"><text:soft-page-break/>Acceptance criteria:</text:p>
      <text:list xml:id="list346193274" text:style-name="L124">
        <text:list-item>
          <text:p text:style-name="P126">Atlas Optimization view is available inside the existing app.</text:p>
        </text:list-item>
        <text:list-item>
          <text:p text:style-name="P126">Existing backgrounds/cards/sticky-note resources are reused.</text:p>
        </text:list-item>
        <text:list-item>
          <text:p text:style-name="P126">User can place Atlas modeling cards on the canvas.</text:p>
        </text:list-item>
        <text:list-item>
          <text:p text:style-name="P126">Cards show editable text/keywords/properties rather than defaulting to PDF showcase.</text:p>
        </text:list-item>
        <text:list-item>
          <text:p text:style-name="P126">Existing app behavior is not broken.</text:p>
        </text:list-item>
      </text:list>
      <text:p text:style-name="Text_20_body">Constraints:</text:p>
      <text:list xml:id="list3755161096" text:style-name="L125">
        <text:list-item>
          <text:p text:style-name="P127">Do not rewrite the whole canvas system.</text:p>
        </text:list-item>
        <text:list-item>
          <text:p text:style-name="P127">Do not remove PDF support.</text:p>
        </text:list-item>
        <text:list-item>
          <text:p text:style-name="P127">Do not hard-code one optimization example into the UI.</text:p>
        </text:list-item>
        <text:list-item>
          <text:p text:style-name="P127">Keep the prototype small and robust.</text:p>
        </text:list-item>
      </text:list>
      <text:p text:style-name="P6"/>
      <text:p text:style-name="P46">Batch 8 / Prompt 2 — Living cards with draggable traits, tags, and properties</text:p>
      <text:p text:style-name="Text_20_body">Context:<text:line-break/>Atlas cards should be living modeling objects. A card is not just a visual note; it can receive tags, traits, properties, diagnostics, formulas, and decision references. These pieces should also be visible and draggable where useful. Users should be able to drag a trait/property/tag module onto a card to attach it.</text:p>
      <text:p text:style-name="Text_20_body">Goal:<text:line-break/>Implement living cards with attachable draggable modules.</text:p>
      <text:p text:style-name="Text_20_body">Detailed requirements:</text:p>
      <text:list xml:id="list371495023" text:style-name="L126">
        <text:list-item>
          <text:p text:style-name="P128">Extend Atlas cards with attachable modules:</text:p>
          <text:list>
            <text:list-item>
              <text:p text:style-name="P128">tag module</text:p>
            </text:list-item>
            <text:list-item>
              <text:p text:style-name="P128">trait module</text:p>
            </text:list-item>
            <text:list-item>
              <text:p text:style-name="P128">property module</text:p>
            </text:list-item>
            <text:list-item>
              <text:p text:style-name="P128">diagnostic module</text:p>
            </text:list-item>
            <text:list-item>
              <text:p text:style-name="P128">note module</text:p>
            </text:list-item>
          </text:list>
        </text:list-item>
        <text:list-item>
          <text:p text:style-name="P128">Each module should have:</text:p>
          <text:list>
            <text:list-item>
              <text:p text:style-name="P128">id</text:p>
            </text:list-item>
            <text:list-item>
              <text:p text:style-name="P128">kind</text:p>
            </text:list-item>
            <text:list-item>
              <text:p text:style-name="P128">label/name</text:p>
            </text:list-item>
            <text:list-item>
              <text:p text:style-name="P128">value or expression</text:p>
            </text:list-item>
            <text:list-item>
              <text:p text:style-name="P128">optional unit</text:p>
            </text:list-item>
            <text:list-item>
              <text:p text:style-name="P128"><text:soft-page-break/>optional notes</text:p>
            </text:list-item>
            <text:list-item>
              <text:p text:style-name="P128">optional visual position on/near the card</text:p>
            </text:list-item>
          </text:list>
        </text:list-item>
        <text:list-item>
          <text:p text:style-name="P128">Add a small module palette/sidebar with starter modules:</text:p>
          <text:list>
            <text:list-item>
              <text:p text:style-name="P128">tag</text:p>
            </text:list-item>
            <text:list-item>
              <text:p text:style-name="P128">property</text:p>
            </text:list-item>
            <text:list-item>
              <text:p text:style-name="P128">trait</text:p>
            </text:list-item>
            <text:list-item>
              <text:p text:style-name="P128">diagnostic</text:p>
            </text:list-item>
            <text:list-item>
              <text:p text:style-name="P128">note</text:p>
            </text:list-item>
          </text:list>
        </text:list-item>
        <text:list-item>
          <text:p text:style-name="P128">Allow dragging modules from the palette onto a card.</text:p>
        </text:list-item>
        <text:list-item>
          <text:p text:style-name="P128">Dropping a module onto a card attaches it to that card.</text:p>
        </text:list-item>
        <text:list-item>
          <text:p text:style-name="P128">Attached modules should render on top of or next to the card background.</text:p>
        </text:list-item>
        <text:list-item>
          <text:p text:style-name="P128">Attached modules should be draggable within the card or around the card.</text:p>
        </text:list-item>
        <text:list-item>
          <text:p text:style-name="P128">User can edit module label/value/unit/notes in inspector or inline.</text:p>
        </text:list-item>
        <text:list-item>
          <text:p text:style-name="P128">User can detach/delete modules.</text:p>
        </text:list-item>
        <text:list-item>
          <text:p text:style-name="P128">Store attached modules in the card JSON state.</text:p>
        </text:list-item>
        <text:list-item>
          <text:p text:style-name="P128">Keep modules generic; do not implement domain archetypes yet.</text:p>
        </text:list-item>
        <text:list-item>
          <text:p text:style-name="P128">Example modules may include:</text:p>
          <text:list>
            <text:list-item>
              <text:p text:style-name="P128">dimension</text:p>
            </text:list-item>
            <text:list-item>
              <text:p text:style-name="P128">price</text:p>
            </text:list-item>
            <text:list-item>
              <text:p text:style-name="P128">cost</text:p>
            </text:list-item>
            <text:list-item>
              <text:p text:style-name="P128">capacity</text:p>
            </text:list-item>
            <text:list-item>
              <text:p text:style-name="P128">type=product</text:p>
            </text:list-item>
            <text:list-item>
              <text:p text:style-name="P128">factory=A</text:p>
            </text:list-item>
          </text:list>
        </text:list-item>
      </text:list>
      <text:p text:style-name="Text_20_body">Testing:</text:p>
      <text:list xml:id="list1506672174" text:style-name="L127">
        <text:list-item>
          <text:p text:style-name="P129">Add tests for attach/detach module state helpers.</text:p>
        </text:list-item>
        <text:list-item>
          <text:p text:style-name="P129">Add tests that modules persist with cards.</text:p>
        </text:list-item>
        <text:list-item>
          <text:p text:style-name="P129">Add render test if feasible.</text:p>
        </text:list-item>
        <text:list-item>
          <text:p text:style-name="P129">Add manual test checklist:</text:p>
          <text:list>
            <text:list-item>
              <text:p text:style-name="P129">drag property module onto card</text:p>
            </text:list-item>
            <text:list-item>
              <text:p text:style-name="P129">edit value</text:p>
            </text:list-item>
            <text:list-item>
              <text:p text:style-name="P129">move module inside/near card</text:p>
            </text:list-item>
            <text:list-item>
              <text:p text:style-name="P129">refresh page</text:p>
            </text:list-item>
            <text:list-item>
              <text:p text:style-name="P129"><text:soft-page-break/>module remains attached</text:p>
            </text:list-item>
          </text:list>
        </text:list-item>
      </text:list>
      <text:p text:style-name="Text_20_body">Acceptance criteria:</text:p>
      <text:list xml:id="list1973771310" text:style-name="L128">
        <text:list-item>
          <text:p text:style-name="P130">User can drag a property/trait/tag module onto a card.</text:p>
        </text:list-item>
        <text:list-item>
          <text:p text:style-name="P130">The module becomes part of the card.</text:p>
        </text:list-item>
        <text:list-item>
          <text:p text:style-name="P130">Attached modules are visible on the card.</text:p>
        </text:list-item>
        <text:list-item>
          <text:p text:style-name="P130">Attached modules can be edited, moved, and deleted.</text:p>
        </text:list-item>
        <text:list-item>
          <text:p text:style-name="P130">Existing card movement still works.</text:p>
        </text:list-item>
      </text:list>
      <text:p text:style-name="Text_20_body">Constraints:</text:p>
      <text:list xml:id="list2391071133" text:style-name="L129">
        <text:list-item>
          <text:p text:style-name="P131">Do not over-engineer formulas yet.</text:p>
        </text:list-item>
        <text:list-item>
          <text:p text:style-name="P131">Do not require every property to be manually typed in hidden dialogs.</text:p>
        </text:list-item>
        <text:list-item>
          <text:p text:style-name="P131">Do not break existing sticky-note/card behavior.</text:p>
        </text:list-item>
      </text:list>
      <text:p text:style-name="P6"/>
      <text:p text:style-name="P6"/>
      <text:p text:style-name="P46">Batch 8 / Prompt 3 — Runtime diagnostics attached to cards</text:p>
      <text:p text:style-name="Text_20_body">Context:<text:line-break/>Atlas cards should display computed diagnostics near the card, especially on the right side of the card. Diagnostics may include dimensions, price, current value, solution value, residual, status, missing data, or any other computable property. Diagnostics should update when Evaluate or Solve is run.</text:p>
      <text:p text:style-name="Text_20_body">Goal:<text:line-break/>Implement card-attached runtime diagnostics.</text:p>
      <text:p text:style-name="Text_20_body">Detailed requirements:</text:p>
      <text:list xml:id="list2060640989" text:style-name="L130">
        <text:list-item>
          <text:p text:style-name="P132">Add a diagnostic data structure separate from persistent user-defined properties:</text:p>
          <text:list>
            <text:list-item>
              <text:p text:style-name="P132">cardId</text:p>
            </text:list-item>
            <text:list-item>
              <text:p text:style-name="P132">diagnosticId</text:p>
            </text:list-item>
            <text:list-item>
              <text:p text:style-name="P132">label</text:p>
            </text:list-item>
            <text:list-item>
              <text:p text:style-name="P132">value</text:p>
            </text:list-item>
            <text:list-item>
              <text:p text:style-name="P132">unit optional</text:p>
            </text:list-item>
            <text:list-item>
              <text:p text:style-name="P132">status: ok | warning | error | stale</text:p>
            </text:list-item>
            <text:list-item>
              <text:p text:style-name="P132">source: evaluate | solve | validate | manual</text:p>
            </text:list-item>
            <text:list-item>
              <text:p text:style-name="P132">timestamp optional</text:p>
            </text:list-item>
          </text:list>
        </text:list-item>
        <text:list-item>
          <text:p text:style-name="P132">Render diagnostics near the right edge of each card.</text:p>
        </text:list-item>
        <text:list-item>
          <text:p text:style-name="P132">Diagnostics should not overwrite user-defined properties.</text:p>
        </text:list-item>
        <text:list-item>
          <text:p text:style-name="P132"><text:soft-page-break/>Diagnostics may be collapsible if there are many.</text:p>
        </text:list-item>
        <text:list-item>
          <text:p text:style-name="P132">Add support for diagnostics returned by evaluation/solve/validation.</text:p>
        </text:list-item>
        <text:list-item>
          <text:p text:style-name="P132">When Evaluate runs:</text:p>
          <text:list>
            <text:list-item>
              <text:p text:style-name="P132">update relevant diagnostics for selected cards/functions/objectives/constraints.</text:p>
            </text:list-item>
          </text:list>
        </text:list-item>
        <text:list-item>
          <text:p text:style-name="P132">When Solve runs:</text:p>
          <text:list>
            <text:list-item>
              <text:p text:style-name="P132">update decision value diagnostics on cards/properties.</text:p>
            </text:list-item>
            <text:list-item>
              <text:p text:style-name="P132">update objective and constraint diagnostics where available.</text:p>
            </text:list-item>
          </text:list>
        </text:list-item>
        <text:list-item>
          <text:p text:style-name="P132">When the model changes after solving:</text:p>
          <text:list>
            <text:list-item>
              <text:p text:style-name="P132">mark solution-derived diagnostics as stale.</text:p>
            </text:list-item>
          </text:list>
        </text:list-item>
        <text:list-item>
          <text:p text:style-name="P132">Clicking a diagnostic should show details in the inspector.</text:p>
        </text:list-item>
        <text:list-item>
          <text:p text:style-name="P132">Diagnostics should be visually distinct from editable properties.</text:p>
        </text:list-item>
      </text:list>
      <text:p text:style-name="Text_20_body">Testing:</text:p>
      <text:list xml:id="list1925484115" text:style-name="L131">
        <text:list-item>
          <text:p text:style-name="P133">Add unit tests for diagnostic update/clear/stale helpers.</text:p>
        </text:list-item>
        <text:list-item>
          <text:p text:style-name="P133">Add tests that model edits mark solve diagnostics stale.</text:p>
        </text:list-item>
        <text:list-item>
          <text:p text:style-name="P133">Add render tests if feasible.</text:p>
        </text:list-item>
        <text:list-item>
          <text:p text:style-name="P133">Add backend/frontend integration test if current test setup supports it.</text:p>
        </text:list-item>
        <text:list-item>
          <text:p text:style-name="P133">Add manual test checklist:</text:p>
          <text:list>
            <text:list-item>
              <text:p text:style-name="P133">evaluate expression</text:p>
            </text:list-item>
            <text:list-item>
              <text:p text:style-name="P133">diagnostic appears</text:p>
            </text:list-item>
            <text:list-item>
              <text:p text:style-name="P133">solve model</text:p>
            </text:list-item>
            <text:list-item>
              <text:p text:style-name="P133">solution diagnostic appears</text:p>
            </text:list-item>
            <text:list-item>
              <text:p text:style-name="P133">edit card</text:p>
            </text:list-item>
            <text:list-item>
              <text:p text:style-name="P133">diagnostic becomes stale</text:p>
            </text:list-item>
          </text:list>
        </text:list-item>
      </text:list>
      <text:p text:style-name="Text_20_body">Acceptance criteria:</text:p>
      <text:list xml:id="list584787813" text:style-name="L132">
        <text:list-item>
          <text:p text:style-name="P134">Cards can show computed diagnostics on their right side.</text:p>
        </text:list-item>
        <text:list-item>
          <text:p text:style-name="P134">Evaluation and solve results update diagnostics.</text:p>
        </text:list-item>
        <text:list-item>
          <text:p text:style-name="P134">Diagnostics can be inspected.</text:p>
        </text:list-item>
        <text:list-item>
          <text:p text:style-name="P134">Stale diagnostics are clearly marked.</text:p>
        </text:list-item>
        <text:list-item>
          <text:p text:style-name="P134">Persistent user-defined properties remain separate from runtime diagnostics.</text:p>
        </text:list-item>
      </text:list>
      <text:p text:style-name="Text_20_body">Constraints:</text:p>
      <text:list xml:id="list839112218" text:style-name="L133">
        <text:list-item>
          <text:p text:style-name="P135">Do not store transient diagnostics in exported model unless explicitly useful.</text:p>
        </text:list-item>
        <text:list-item>
          <text:p text:style-name="P135">Do not confuse diagnostics with model-defining properties.</text:p>
        </text:list-item>
        <text:list-item>
          <text:p text:style-name="P135"><text:soft-page-break/>Preserve existing functionality.</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de" fo:country="CH"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de" fo:country="CH"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e74b5"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Noto Sans Arabic UI" style:font-family-complex="'Noto Sans Arabic UI'"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e74b5" loext:opacity="100%" fo:font-size="14pt" style:font-name-asian="Calibri1" style:font-family-asian="Calibri"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e74b5" loext:opacity="100%" fo:font-style="italic" style:font-name-asian="Calibri1" style:font-family-asian="Calibri"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e74b5" loext:opacity="100%" style:font-name-asian="Calibri1" style:font-family-asian="Calibri" style:font-family-generic-asian="system" style:font-pitch-asian="variable" style:font-name-complex="Noto Sans Arabic UI" style:font-family-complex="'Noto Sans Arabic UI'"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Calibri1" style:font-family-asian="Calibri"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Calibri1" style:font-family-asian="Calibri" style:font-family-generic-asian="system" style:font-pitch-asian="variable" style:font-name-complex="Noto Sans Arabic UI" style:font-family-complex="'Noto Sans Arabic UI'"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Calibri1" style:font-family-asian="Calibri"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Calibri1" style:font-family-asian="Calibri" style:font-family-generic-asian="system" style:font-pitch-asian="variable" style:font-name-complex="Noto Sans Arabic UI" style:font-family-complex="'Noto Sans Arabic UI'" style:font-family-generic-complex="system" style:font-pitch-complex="variable"/>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Calibri1" style:font-family-asian="Calibri"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2e74b5" fo:border-bottom="0.51pt solid #2e74b5"/>
      <style:text-properties fo:color="#2e74b5" loext:opacity="100%" fo:font-style="italic" style:font-style-asian="italic"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Noto Sans Arabic UI" style:font-family-complex="'Noto Sans Arabic UI'"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2e74b5" loext:opacity="100%" fo:font-size="14pt" style:font-name-asian="Calibri1" style:font-family-asian="Calibri"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2e74b5" loext:opacity="100%" fo:font-style="italic" style:font-name-asian="Calibri1" style:font-family-asian="Calibri"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2e74b5" loext:opacity="100%" style:font-name-asian="Calibri1" style:font-family-asian="Calibri" style:font-family-generic-asian="system" style:font-pitch-asian="variable" style:font-name-complex="Noto Sans Arabic UI" style:font-family-complex="'Noto Sans Arabic UI'"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Calibri1" style:font-family-asian="Calibri"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Calibri1" style:font-family-asian="Calibri" style:font-family-generic-asian="system" style:font-pitch-asian="variable" style:font-name-complex="Noto Sans Arabic UI" style:font-family-complex="'Noto Sans Arabic UI'"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Calibri1" style:font-family-asian="Calibri"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Calibri1" style:font-family-asian="Calibri" style:font-family-generic-asian="system" style:font-pitch-asian="variable" style:font-name-complex="Noto Sans Arabic UI" style:font-family-complex="'Noto Sans Arabic UI'" style:font-family-generic-complex="system" style:font-pitch-complex="variable"/>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Calibri1" style:font-family-asian="Calibri"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2e74b5"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2e74b5"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2e74b5" loext:opacity="100%" fo:letter-spacing="0.0035in" fo:font-weight="bold" style:font-weight-asian="bold"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emil Avers Butt</meta:initial-creator>
    <meta:editing-cycles>15</meta:editing-cycles>
    <meta:creation-date>2025-04-16T13:38:00</meta:creation-date>
    <dc:date>2026-06-26T00:09:45.098717322</dc:date>
    <meta:editing-duration>PT1H6M50S</meta:editing-duration>
    <meta:generator>LibreOffice/7.3.7.2$Linux_X86_64 LibreOffice_project/30$Build-2</meta:generator>
    <meta:document-statistic meta:table-count="0" meta:image-count="0" meta:object-count="0" meta:page-count="58" meta:paragraph-count="1505" meta:word-count="9918" meta:character-count="63348" meta:non-whitespace-character-count="56083"/>
    <meta:user-defined meta:name="AppVersion">16.0000</meta:user-defined>
    <meta:template xlink:type="simple" xlink:actuate="onRequest" xlink:title="Normal.dotm" xlink:href=""/>
  </office:meta>
</office:document-meta>
</file>